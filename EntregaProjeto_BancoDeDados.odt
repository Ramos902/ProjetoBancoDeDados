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F000002D46EAA16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'Cascadia Mono', 'Segoe UI Mono', 'Liberation Mono', Menlo, Monaco, Consolas, monospace"/>
  </office:font-face-decls>
  <office:automatic-styles>
    <style:style style:name="P1" style:family="paragraph" style:parent-style-name="Title">
      <style:text-properties style:font-name="Liberation Sans" fo:language="pt" fo:country="PT"/>
    </style:style>
    <style:style style:name="P2" style:family="paragraph" style:parent-style-name="Text_20_body">
      <style:paragraph-properties fo:text-align="center" style:justify-single-word="false"/>
      <style:text-properties style:font-name="Liberation Sans" fo:language="pt" fo:country="PT" officeooo:rsid="000c46ee" officeooo:paragraph-rsid="000c46ee"/>
    </style:style>
    <style:style style:name="P3" style:family="paragraph" style:parent-style-name="Text_20_body">
      <style:paragraph-properties fo:text-align="center" style:justify-single-word="false"/>
      <style:text-properties style:font-name="Liberation Sans" fo:language="pt" fo:country="PT" officeooo:paragraph-rsid="000c46ee"/>
    </style:style>
    <style:style style:name="P4" style:family="paragraph" style:parent-style-name="Heading_20_2">
      <style:text-properties style:font-name="Liberation Sans" fo:language="pt" fo:country="PT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style:use-window-font-color="true" loext:opacity="0%" style:font-name="Liberation Sans" fo:font-size="11pt" fo:language="pt" fo:country="PT" fo:font-weight="normal" fo:background-color="transparent" style:font-size-asian="11pt" style:font-size-complex="11pt"/>
    </style:style>
    <style:style style:name="P6" style:family="paragraph" style:parent-style-name="Standard">
      <style:paragraph-properties style:line-height-at-least="0.198in"/>
      <style:text-properties style:use-window-font-color="true" loext:opacity="0%" style:font-name="Liberation Sans" fo:font-size="11pt" fo:language="pt" fo:country="PT" fo:background-color="transparent" style:font-size-asian="11pt" style:font-size-complex="11pt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style:use-window-font-color="true" loext:opacity="0%" style:font-name="Liberation Sans" fo:font-size="11pt" fo:language="pt" fo:country="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style:use-window-font-color="true" loext:opacity="0%" style:font-name="Liberation Sans" fo:font-size="11pt" fo:font-weight="normal" fo:background-color="transparent" style:font-size-asian="11pt" style:font-size-complex="11pt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style:font-name="Liberation Sans"/>
    </style:style>
    <style:style style:name="P10" style:family="paragraph" style:parent-style-name="Heading_20_2">
      <style:paragraph-properties fo:break-before="page"/>
      <style:text-properties style:font-name="Liberation Sans"/>
    </style:style>
    <style:style style:name="P11" style:family="paragraph" style:parent-style-name="Text_20_body">
      <style:text-properties style:font-name="Liberation Sans" officeooo:paragraph-rsid="00089b48"/>
    </style:style>
    <style:style style:name="P12" style:family="paragraph" style:parent-style-name="Text_20_body">
      <style:text-properties style:use-window-font-color="true" loext:opacity="0%" style:font-name="Liberation Sans" fo:font-size="11pt" fo:language="pt" fo:country="PT" fo:font-weight="normal" officeooo:rsid="0006c4ba" officeooo:paragraph-rsid="0006c4ba" fo:background-color="transparent" style:font-size-asian="11pt" style:font-size-complex="11pt"/>
    </style:style>
    <style:style style:name="P13" style:family="paragraph" style:parent-style-name="Heading_20_2">
      <style:text-properties style:font-name="Liberation Sans" officeooo:paragraph-rsid="0009ebfd"/>
    </style:style>
    <style:style style:name="P14" style:family="paragraph" style:parent-style-name="Heading_20_2">
      <style:paragraph-properties fo:break-before="page"/>
      <style:text-properties style:font-name="Liberation Sans" officeooo:paragraph-rsid="0009ebfd"/>
    </style:style>
    <style:style style:name="P15" style:family="paragraph" style:parent-style-name="Standard">
      <style:text-properties style:font-name="Liberation Sans"/>
    </style:style>
    <style:style style:name="P16" style:family="paragraph" style:parent-style-name="Standard">
      <style:paragraph-properties fo:text-align="left" style:justify-single-word="false"/>
      <style:text-properties style:use-window-font-color="true" loext:opacity="0%" style:font-name="Liberation Sans" fo:font-size="11pt" fo:language="pt" fo:country="PT" officeooo:rsid="000503cb" officeooo:paragraph-rsid="000503cb" fo:background-color="transparent" style:font-size-asian="11pt" style:font-size-complex="11pt"/>
    </style:style>
    <style:style style:name="P17" style:family="paragraph" style:parent-style-name="Code">
      <loext:graphic-properties draw:fill="solid" draw:fill-color="#000000" draw:opacity="100%"/>
      <style:paragraph-properties fo:background-color="#000000"/>
    </style:style>
    <style:style style:name="P18" style:family="paragraph" style:parent-style-name="Standard">
      <style:paragraph-properties fo:margin-top="0in" fo:margin-bottom="0.1965in" style:contextual-spacing="false" style:line-height-at-least="0.198in"/>
      <style:text-properties fo:color="#bbbebf" loext:opacity="100%" style:font-name="Droid Sans Mono" fo:font-size="10.5pt" fo:font-weight="normal" fo:background-color="#121314"/>
    </style:style>
    <style:style style:name="P19" style:family="paragraph" style:parent-style-name="Code">
      <loext:graphic-properties draw:fill="none" draw:fill-color="#ffffff" draw:opacity="100%"/>
      <style:paragraph-properties fo:background-color="transparent"/>
      <style:text-properties officeooo:paragraph-rsid="000ab364"/>
    </style:style>
    <style:style style:name="P20" style:family="paragraph" style:parent-style-name="Heading_20_2">
      <style:paragraph-properties fo:margin-top="0in" fo:margin-bottom="0in" style:contextual-spacing="false"/>
    </style:style>
    <style:style style:name="P21" style:family="paragraph" style:parent-style-name="Code">
      <loext:graphic-properties draw:fill="solid" draw:fill-color="#000000" draw:opacity="100%"/>
      <style:paragraph-properties fo:background-color="#000000"/>
      <style:text-properties officeooo:paragraph-rsid="000ab364"/>
    </style:style>
    <style:style style:name="P22" style:family="paragraph" style:parent-style-name="Text_20_body">
      <style:text-properties officeooo:paragraph-rsid="000ab364"/>
    </style:style>
    <style:style style:name="T1" style:family="text">
      <style:text-properties officeooo:rsid="000c46ee"/>
    </style:style>
    <style:style style:name="T2" style:family="text">
      <style:text-properties officeooo:rsid="000cf3c9"/>
    </style:style>
    <style:style style:name="T3" style:family="text">
      <style:text-properties fo:language="pt" fo:country="PT"/>
    </style:style>
    <style:style style:name="T4" style:family="text">
      <style:text-properties style:use-window-font-color="true" loext:opacity="0%" fo:font-size="11pt" fo:language="pt" fo:country="PT" fo:font-weight="normal" fo:background-color="transparent" loext:char-shading-value="0" style:font-size-asian="11pt" style:font-size-complex="11pt"/>
    </style:style>
    <style:style style:name="T5" style:family="text">
      <style:text-properties style:use-window-font-color="true" loext:opacity="0%" fo:font-size="11pt" fo:language="pt" fo:country="PT" fo:font-weight="bold" fo:background-color="transparent" loext:char-shading-value="0" style:font-size-asian="11pt" style:font-size-complex="11pt"/>
    </style:style>
    <style:style style:name="T6" style:family="text">
      <style:text-properties officeooo:rsid="00089b48"/>
    </style:style>
    <style:style style:name="T7" style:family="text">
      <style:text-properties fo:font-variant="normal" fo:text-transform="none" fo:color="#000000" loext:opacity="100%" fo:font-size="11pt" fo:letter-spacing="0.0209in" fo:font-style="normal" fo:font-weight="normal" officeooo:rsid="0009ebfd" fo:background-color="transparent" loext:char-shading-value="0" style:font-size-asian="11pt" style:font-size-complex="11pt" loext:padding="0in" loext:border="none"/>
    </style:style>
    <style:style style:name="T8" style:family="text">
      <style:text-properties fo:color="#ff7b72" loext:opacity="100%"/>
    </style:style>
    <style:style style:name="T9" style:family="text">
      <style:text-properties fo:color="#dcdcaa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569cd6" loext:opacity="100%"/>
    </style:style>
    <style:style style:name="T12" style:family="text">
      <style:text-properties style:font-name="Liberation Sans"/>
    </style:style>
    <style:style style:name="T13" style:family="text">
      <style:text-properties fo:color="#79c0ff" loext:opacity="100%"/>
    </style:style>
    <style:style style:name="T14" style:family="text">
      <style:text-properties fo:color="#a5d6ff" loext:opacity="100%"/>
    </style:style>
    <style:style style:name="T15" style:family="text">
      <style:text-properties fo:color="#d4d4d4" loext:opacity="100%"/>
    </style:style>
    <style:style style:name="T16" style:family="text">
      <style:text-properties fo:color="#ffa657" loext:opacity="100%"/>
    </style:style>
    <style:style style:name="T17" style:family="text">
      <style:text-properties fo:color="#8b949e" loext:opacity="100%"/>
    </style:style>
    <style:style style:name="T18" style:family="text">
      <style:text-properties style:font-name="Liberation Sans" officeooo:rsid="000ab364"/>
    </style:style>
    <style:style style:name="T19" style:family="text">
      <style:text-properties fo:color="#8b949e" loext:opacity="100%" style:font-name="Droid Sans Mono" fo:font-size="10.5pt" fo:font-weight="normal" officeooo:rsid="000ab364" fo:background-color="#121314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nline_20_Heading">
      <style:graphic-properties style:vertical-pos="middle" style:vertical-rel="tex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Final Power BI</text:p>
      <text:p text:style-name="P2">João Pedro Ramos Moraes, Fernando Costa de Almeida, Mateus Bueno Silva</text:p>
      <text:p text:style-name="P3"><text:span text:style-name="T1">Repositório Github: </text:span><text:a xlink:type="simple" xlink:href="https://github.com/Ramos902/ProjetoBancoDeDados" text:style-name="Internet_20_link" text:visited-style-name="Visited_20_Internet_20_Link"><text:span text:style-name="T2">Ramos902</text:span></text:a></text:p>
      <text:h text:style-name="P4" text:outline-level="2">Fase 1: Justificativa/Embasamento</text:h>
      <text:p text:style-name="P5">- Entregável: Desenvolver um texto, explicando sobre o assunto abordado, tipo de negócio, quais mercados, tipo de segmento, o que faz. </text:p>
      <text:p text:style-name="P6"/>
      <text:p text:style-name="P7">1. O que é o negócio?</text:p>
      <text:p text:style-name="P5">O setor de salões de beleza e estética é composto por empresas e profissionais que oferecem serviços e comercializam produtos relacionados aos cuidados com a aparência, saúde e bem-estar. Entre os principais serviços estão cortes de cabelo, manicure, pedicure, maquiagem, tratamentos estéticos, depilação, entre outros procedimentos voltados à estética pessoal.</text:p>
      <text:p text:style-name="P6"/>
      <text:p text:style-name="P7">2. Em que mercado ele está?</text:p>
      <text:p text:style-name="P8"><text:span text:style-name="T3">Ele se encontra no mercado de Beleza e bem-estar, de acordo com a pesquisa </text:span><text:a xlink:type="simple" xlink:href="https://g1.globo.com/jornal-nacional/noticia/2026/02/21/setor-da-beleza-abre-mais-de-235-mil-novos-negocios-e-impulsiona-empreendedorismo.ghtml" text:style-name="Internet_20_link" text:visited-style-name="Visited_20_Internet_20_Link"><text:span text:style-name="T3">Setor da beleza abre mais de 235 mil novos negócios e impulsiona empreendedorismo</text:span></text:a><text:span text:style-name="T3">, somente no ano de 2025 no Brasil foram registrados mais de 235 mil novos negócios nesse setor, demonstrando o crescimento da demanda e o fortalecimento do empreendedorismo na área.</text:span></text:p>
      <text:p text:style-name="P6"/>
      <text:p text:style-name="P7">3. Por que é relevante? </text:p>
      <text:p text:style-name="P9"><text:span text:style-name="T4">Devido ao crescimento do setor de beleza e estética, torna-se essencial analisar os dados gerados pelo negócio para responder a perguntas importantes, como: </text:span><text:span text:style-name="T5">Quantos atendimentos foram realizados?</text:span><text:span text:style-name="T4">, </text:span><text:span text:style-name="T5">Em quais pontos o negócio está apresentando falhas?</text:span><text:span text:style-name="T4"> e </text:span><text:span text:style-name="T5">Como é possível expandir a empresa de forma eficiente?</text:span><text:span text:style-name="T4">. Nesse contexto, a análise de dados desempenha um papel fundamental, permitindo que gestores tomem decisões mais estratégicas e fundamentadas. Para isso, é indispensável a utilização de um banco de dados estruturado, capaz de armazenar, organizar e disponibilizar as informações de forma segura e eficiente.</text:span></text:p>
      <text:p text:style-name="P5"/>
      <text:h text:style-name="P10" text:outline-level="2"><text:span text:style-name="T6">F</text:span>ase 2: Modelagem Conceitual do banco de dados (UML)</text:h>
      <text:p text:style-name="P11">- Entregável: Diagrama Entidade-Relacionamento (DER), chaves primárias, chaves estrangeiras, relacionamentos, atributos mais relevantes.</text:p>
      <text:p text:style-name="P12">Diagrama desenvolvido utilizando a ferramenta mermaid em readme:</text:p>
      <text:h text:style-name="P13" text:outline-level="2" text:is-list-header="true"><draw:frame draw:style-name="fr1" draw:name="Image1" text:anchor-type="char" svg:width="6.9252in" svg:height="4.6118in" draw:z-index="0"><draw:image xlink:href="Pictures/100000010000043F000002D46EAA1665.png" xlink:type="simple" xlink:show="embed" xlink:actuate="onLoad" draw:mime-type="image/png"/></draw:frame><text:line-break/></text:h>
      <text:h text:style-name="P14" text:outline-level="2">Fase 3: Implementação do Banco de Dados</text:h>
      <text:p text:style-name="P15">- Entregável: Script SQL de criação do schema (CREATE DATABASE, CREATE TABLE, constraints, índices). + Script de povoamento (INSERT) com dados de teste relevantes (mínimo 30-50 registros por tabela principal).</text:p>
      <text:p text:style-name="P16"/>
      <text:p text:style-name="Standard"><text:span text:style-name="Source_20_Text"><text:span text:style-name="T7"/></text:span></text:p>
      <text:p text:style-name="P17"><text:span text:style-name="Source_20_Text">-- =============================================</text:span></text:p>
      <text:p text:style-name="P17">-- Fase 3: Implementação do Banco de Dados</text:p>
      <text:p text:style-name="P17">-- Projeto: Salão de Beleza / Estética</text:p>
      <text:p text:style-name="P17">-- =============================================</text:p>
      <text:p text:style-name="P17"/>
      <text:p text:style-name="P17"><text:span text:style-name="T8">CREATE</text:span> <text:span text:style-name="T9">DATABASE</text:span> salaodebeleza;</text:p>
      <text:p text:style-name="P17"/>
      <text:p text:style-name="P17"><text:span text:style-name="T8">CREATE</text:span> <text:span text:style-name="T8">TABLE</text:span> Especialidade (</text:p>
      <text:p text:style-name="P17"><text:span text:style-name="T8">ID</text:span> <text:span text:style-name="T8">SERIAL</text:span> <text:span text:style-name="T8">PRIMARY</text:span> <text:span text:style-name="T8">KEY</text:span>,</text:p>
      <text:p text:style-name="P17">Nome <text:span text:style-name="T8">VARCHAR</text:span>(<text:span text:style-name="T10">100</text:span>) <text:span text:style-name="T8">NOT</text:span> <text:span text:style-name="T8">NULL</text:span></text:p>
      <text:p text:style-name="P17">);</text:p>
      <text:p text:style-name="P17"/>
      <text:p text:style-name="P17"><text:span text:style-name="T8">CREATE</text:span> <text:span text:style-name="T8">TABLE</text:span> Atendente (</text:p>
      <text:p text:style-name="P17"><text:span text:style-name="T8">ID</text:span> <text:span text:style-name="T8">SERIAL</text:span> <text:span text:style-name="T8">PRIMARY</text:span> <text:span text:style-name="T8">KEY</text:span>,</text:p>
      <text:p text:style-name="P17">Nome <text:span text:style-name="T8">VARCHAR</text:span>(<text:span text:style-name="T10">100</text:span>) <text:span text:style-name="T8">NOT</text:span> <text:span text:style-name="T8">NULL</text:span>,</text:p>
      <text:p text:style-name="P17">AnoNasc <text:span text:style-name="T8">DATE</text:span>,</text:p>
      <text:p text:style-name="P17">DataInicio <text:span text:style-name="T8">DATE</text:span>,</text:p>
      <text:p text:style-name="P17">DataFinal <text:span text:style-name="T8">DATE</text:span>,</text:p>
      <text:p text:style-name="P17">Salario <text:span text:style-name="T8">NUMERIC</text:span>(<text:span text:style-name="T10">10</text:span>, <text:span text:style-name="T10">2</text:span>),</text:p>
      <text:p text:style-name="P17">Telefone <text:span text:style-name="T8">VARCHAR</text:span>(<text:span text:style-name="T10">20</text:span>)</text:p>
      <text:p text:style-name="P17">);</text:p>
      <text:p text:style-name="P17"/>
      <text:p text:style-name="P17"><text:span text:style-name="T8">CREATE</text:span> <text:span text:style-name="T8">TABLE</text:span> Atendente_Especialidade (</text:p>
      <text:p text:style-name="P17">fk_Atendente <text:span text:style-name="T8">INT</text:span> <text:span text:style-name="T8">NOT</text:span> <text:span text:style-name="T8">NULL</text:span> <text:span text:style-name="T11">REFERENCES</text:span> Atendente(<text:span text:style-name="T8">ID</text:span>) <text:span text:style-name="T11">ON DELETE CASCADE</text:span>,</text:p>
      <text:p text:style-name="P17">fk_Especialidade <text:span text:style-name="T8">INT</text:span> <text:span text:style-name="T8">NOT</text:span> <text:span text:style-name="T8">NULL</text:span> <text:span text:style-name="T11">REFERENCES</text:span> Especialidade(<text:span text:style-name="T8">ID</text:span>) <text:span text:style-name="T11">ON DELETE CASCADE</text:span>,</text:p>
      <text:p text:style-name="P17"><text:span text:style-name="T8">PRIMARY</text:span> <text:span text:style-name="T8">KEY</text:span> (fk_Atendente, fk_Especialidade)</text:p>
      <text:p text:style-name="P17">);</text:p>
      <text:p text:style-name="P17"/>
      <text:p text:style-name="P17"><text:span text:style-name="T8">CREATE</text:span> <text:span text:style-name="T8">TABLE</text:span> Cliente (</text:p>
      <text:p text:style-name="P17"><text:span text:style-name="T8">ID</text:span> <text:span text:style-name="T8">SERIAL</text:span> <text:span text:style-name="T8">PRIMARY</text:span> <text:span text:style-name="T8">KEY</text:span>,</text:p>
      <text:p text:style-name="P17">Nome <text:span text:style-name="T8">VARCHAR</text:span>(<text:span text:style-name="T10">100</text:span>) <text:span text:style-name="T8">NOT</text:span> <text:span text:style-name="T8">NULL</text:span>,</text:p>
      <text:p text:style-name="P17">Telefone <text:span text:style-name="T8">VARCHAR</text:span>(<text:span text:style-name="T10">20</text:span>),</text:p>
      <text:p text:style-name="P17">Email <text:span text:style-name="T8">VARCHAR</text:span>(<text:span text:style-name="T10">150</text:span>),</text:p>
      <text:p text:style-name="P17"><text:soft-page-break/>DataCadastro <text:span text:style-name="T8">DATE</text:span> <text:span text:style-name="T8">DEFAULT</text:span> <text:span text:style-name="T8">CURRENT_DATE</text:span></text:p>
      <text:p text:style-name="P17">);</text:p>
      <text:p text:style-name="P17"/>
      <text:p text:style-name="P17"><text:span text:style-name="T8">CREATE</text:span> <text:span text:style-name="T8">TABLE</text:span> Pagamento (</text:p>
      <text:p text:style-name="P17"><text:span text:style-name="T8">ID</text:span> <text:span text:style-name="T8">SERIAL</text:span> <text:span text:style-name="T8">PRIMARY</text:span> <text:span text:style-name="T8">KEY</text:span>,</text:p>
      <text:p text:style-name="P17">Tipo <text:span text:style-name="T8">VARCHAR</text:span>(<text:span text:style-name="T10">50</text:span>),</text:p>
      <text:p text:style-name="P17">Valor <text:span text:style-name="T8">NUMERIC</text:span>(<text:span text:style-name="T10">10</text:span>, <text:span text:style-name="T10">2</text:span>)</text:p>
      <text:p text:style-name="P17">);</text:p>
      <text:p text:style-name="P17"/>
      <text:p text:style-name="P17"><text:span text:style-name="T8">CREATE</text:span> <text:span text:style-name="T8">TABLE</text:span> Agendamento (</text:p>
      <text:p text:style-name="P17"><text:span text:style-name="T8">ID</text:span> <text:span text:style-name="T8">SERIAL</text:span> <text:span text:style-name="T8">PRIMARY</text:span> <text:span text:style-name="T8">KEY</text:span>,</text:p>
      <text:p text:style-name="P17">Horario <text:span text:style-name="T8">TIMESTAMP</text:span> <text:span text:style-name="T8">NOT</text:span> <text:span text:style-name="T8">NULL</text:span>,</text:p>
      <text:p text:style-name="P17">fk_Cliente <text:span text:style-name="T8">INT</text:span> <text:span text:style-name="T8">NOT</text:span> <text:span text:style-name="T8">NULL</text:span> <text:span text:style-name="T11">REFERENCES</text:span> Cliente(<text:span text:style-name="T8">ID</text:span>) <text:span text:style-name="T11">ON DELETE</text:span> <text:span text:style-name="T8">RESTRICT</text:span>,</text:p>
      <text:p text:style-name="P17">fk_Atendente <text:span text:style-name="T8">INT</text:span> <text:span text:style-name="T8">NOT</text:span> <text:span text:style-name="T8">NULL</text:span> <text:span text:style-name="T11">REFERENCES</text:span> Atendente(<text:span text:style-name="T8">ID</text:span>) <text:span text:style-name="T11">ON DELETE</text:span> <text:span text:style-name="T8">RESTRICT</text:span>,</text:p>
      <text:p text:style-name="P17">fk_Pagamento <text:span text:style-name="T8">INT</text:span> <text:span text:style-name="T11">REFERENCES</text:span> Pagamento(<text:span text:style-name="T8">ID</text:span>) <text:span text:style-name="T11">ON DELETE</text:span> <text:span text:style-name="T8">SET</text:span> <text:span text:style-name="T8">NULL</text:span></text:p>
      <text:p text:style-name="P17">);</text:p>
      <text:p text:style-name="P17"/>
      <text:p text:style-name="P17"><text:span text:style-name="T8">CREATE</text:span> <text:span text:style-name="T8">TABLE</text:span> Procedimento (</text:p>
      <text:p text:style-name="P17"><text:span text:style-name="T8">ID</text:span> <text:span text:style-name="T8">SERIAL</text:span> <text:span text:style-name="T8">PRIMARY</text:span> <text:span text:style-name="T8">KEY</text:span>,</text:p>
      <text:p text:style-name="P17">Nome <text:span text:style-name="T8">VARCHAR</text:span>(<text:span text:style-name="T10">100</text:span>) <text:span text:style-name="T8">NOT</text:span> <text:span text:style-name="T8">NULL</text:span>,</text:p>
      <text:p text:style-name="P17">Valor <text:span text:style-name="T8">NUMERIC</text:span>(<text:span text:style-name="T10">10</text:span>, <text:span text:style-name="T10">2</text:span>)</text:p>
      <text:p text:style-name="P17">);</text:p>
      <text:p text:style-name="P17"/>
      <text:p text:style-name="P17"><text:span text:style-name="T8">CREATE</text:span> <text:span text:style-name="T8">TABLE</text:span> Procedimento_Agendamento (</text:p>
      <text:p text:style-name="P17">fk_Agendamento <text:span text:style-name="T8">INT</text:span> <text:span text:style-name="T8">NOT</text:span> <text:span text:style-name="T8">NULL</text:span> <text:span text:style-name="T11">REFERENCES</text:span> Agendamento(<text:span text:style-name="T8">ID</text:span>) <text:span text:style-name="T11">ON DELETE CASCADE</text:span>,</text:p>
      <text:p text:style-name="P17">fk_Procedimento <text:span text:style-name="T8">INT</text:span> <text:span text:style-name="T8">NOT</text:span> <text:span text:style-name="T8">NULL</text:span> <text:span text:style-name="T11">REFERENCES</text:span> Procedimento(<text:span text:style-name="T8">ID</text:span>) <text:span text:style-name="T11">ON DELETE</text:span> <text:span text:style-name="T8">RESTRICT</text:span>,</text:p>
      <text:p text:style-name="P17"><text:span text:style-name="T8">PRIMARY</text:span> <text:span text:style-name="T8">KEY</text:span> (fk_Agendamento, fk_Procedimento)</text:p>
      <text:p text:style-name="P17">);</text:p>
      <text:p text:style-name="P17"/>
      <text:p text:style-name="P17">-- =============================================</text:p>
      <text:p text:style-name="P17">-- Criação dos Indices</text:p>
      <text:p text:style-name="P17">-- =============================================</text:p>
      <text:p text:style-name="P17"/>
      <text:p text:style-name="P17">-- Buscas frequentes por nome</text:p>
      <text:p text:style-name="P17"><text:span text:style-name="T8">CREATE</text:span> <text:span text:style-name="T8">INDEX</text:span> idx_atendente_nome <text:span text:style-name="T8">ON</text:span> Atendente(Nome);</text:p>
      <text:p text:style-name="P17"><text:span text:style-name="T8">CREATE</text:span> <text:span text:style-name="T8">INDEX</text:span> idx_cliente_nome <text:span text:style-name="T8">ON</text:span> Cliente(Nome);</text:p>
      <text:p text:style-name="P17"><text:span text:style-name="T8">CREATE</text:span> <text:span text:style-name="T8">INDEX</text:span> idx_procedimento_nome <text:span text:style-name="T8">ON</text:span> Procedimento(Nome);</text:p>
      <text:p text:style-name="P17"/>
      <text:p text:style-name="P17"/>
      <text:p text:style-name="P17"><text:soft-page-break/>-- Filtros por período em agendamentos</text:p>
      <text:p text:style-name="P17"><text:span text:style-name="T8">CREATE</text:span> <text:span text:style-name="T8">INDEX</text:span> idx_agendamento_horario <text:span text:style-name="T8">ON</text:span> Agendamento(Horario);</text:p>
      <text:p text:style-name="P17"><text:span text:style-name="T8">CREATE</text:span> <text:span text:style-name="T8">INDEX</text:span> idx_agendamento_atendente <text:span text:style-name="T8">ON</text:span> Agendamento(fk_Atendente);</text:p>
      <text:p text:style-name="P17"><text:span text:style-name="T8">CREATE</text:span> <text:span text:style-name="T8">INDEX</text:span> idx_agendamento_cliente <text:span text:style-name="T8">ON</text:span> Agendamento(fk_Cliente);</text:p>
      <text:p text:style-name="P17"/>
      <text:p text:style-name="P17">-- Busca de clientes por email</text:p>
      <text:p text:style-name="P17"><text:span text:style-name="T8">CREATE</text:span> <text:span text:style-name="T8">INDEX</text:span> idx_cliente_email <text:span text:style-name="T8">ON</text:span> Cliente(Email);</text:p>
      <text:p text:style-name="P18"/>
      <text:h text:style-name="Heading_20_2" text:outline-level="2"><text:span text:style-name="Source_20_Text"><text:span text:style-name="T12">FASE 4: Consultas e Business Intelligence</text:span></text:span></text:h>
      <text:p text:style-name="P17"><text:span text:style-name="Source_20_Text">-- =============================================</text:span></text:p>
      <text:p text:style-name="P17">-- VIEW 1: Visão consolidada de cada agendamento</text:p>
      <text:p text:style-name="P17">-- Base reutilizada pelas demais consultas</text:p>
      <text:p text:style-name="P17">-- =============================================</text:p>
      <text:p text:style-name="P17"><text:span text:style-name="T8">CREATE</text:span> <text:span text:style-name="T8">OR</text:span> <text:span text:style-name="T9">REPLACE</text:span> <text:span text:style-name="T8">VIEW</text:span> vw_agendamentos_completo <text:span text:style-name="T8">AS</text:span></text:p>
      <text:p text:style-name="P17">SELECT</text:p>
      <text:p text:style-name="P17"><text:span text:style-name="T13">ag</text:span>.<text:span text:style-name="T13">ID</text:span> <text:span text:style-name="T8">AS</text:span> agendamento_id,</text:p>
      <text:p text:style-name="P17"><text:span text:style-name="T13">ag</text:span>.<text:span text:style-name="T13">Horario</text:span>,</text:p>
      <text:p text:style-name="P17"><text:span text:style-name="T8">DATE</text:span>(<text:span text:style-name="T13">ag</text:span>.<text:span text:style-name="T13">Horario</text:span>) <text:span text:style-name="T8">AS</text:span> <text:span text:style-name="T8">Data</text:span>,</text:p>
      <text:p text:style-name="P17"><text:span text:style-name="T9">TO_CHAR</text:span>(<text:span text:style-name="T13">ag</text:span>.<text:span text:style-name="T13">Horario</text:span>, <text:span text:style-name="T14">'YYYY-MM'</text:span>) <text:span text:style-name="T8">AS</text:span> AnoMes,</text:p>
      <text:p text:style-name="P17"><text:span text:style-name="T9">EXTRACT</text:span>(<text:span text:style-name="T8">YEAR</text:span> <text:span text:style-name="T8">FROM</text:span> <text:span text:style-name="T13">ag</text:span>.<text:span text:style-name="T13">Horario</text:span>) <text:span text:style-name="T8">AS</text:span> Ano,</text:p>
      <text:p text:style-name="P17"><text:span text:style-name="T9">EXTRACT</text:span>(<text:span text:style-name="T8">MONTH</text:span> <text:span text:style-name="T8">FROM</text:span> <text:span text:style-name="T13">ag</text:span>.<text:span text:style-name="T13">Horario</text:span>) <text:span text:style-name="T8">AS</text:span> Mes,</text:p>
      <text:p text:style-name="P17"><text:span text:style-name="T9">TO_CHAR</text:span>(<text:span text:style-name="T13">ag</text:span>.<text:span text:style-name="T13">Horario</text:span>, <text:span text:style-name="T14">'TMMonth'</text:span>) <text:span text:style-name="T8">AS</text:span> NomeMes,</text:p>
      <text:p text:style-name="P17"><text:span text:style-name="T13">cl</text:span>.<text:span text:style-name="T13">ID</text:span> <text:span text:style-name="T8">AS</text:span> cliente_id,</text:p>
      <text:p text:style-name="P17"><text:span text:style-name="T13">cl</text:span>.<text:span text:style-name="T13">Nome</text:span> <text:span text:style-name="T8">AS</text:span> cliente_nome,</text:p>
      <text:p text:style-name="P17"><text:span text:style-name="T8">at</text:span>.<text:span text:style-name="T8">ID</text:span> <text:span text:style-name="T8">AS</text:span> atendente_id,</text:p>
      <text:p text:style-name="P17"><text:span text:style-name="T8">at</text:span>.Nome <text:span text:style-name="T8">AS</text:span> atendente_nome,</text:p>
      <text:p text:style-name="P17"><text:span text:style-name="T13">pg</text:span>.<text:span text:style-name="T13">Tipo</text:span> <text:span text:style-name="T8">AS</text:span> pagamento_tipo,</text:p>
      <text:p text:style-name="P17"><text:span text:style-name="T13">pg</text:span>.<text:span text:style-name="T13">Valor</text:span> <text:span text:style-name="T8">AS</text:span> pagamento_valor,</text:p>
      <text:p text:style-name="P17"><text:span text:style-name="T13">pr</text:span>.<text:span text:style-name="T13">ID</text:span> <text:span text:style-name="T8">AS</text:span> procedimento_id,</text:p>
      <text:p text:style-name="P17"><text:span text:style-name="T13">pr</text:span>.<text:span text:style-name="T13">Nome</text:span> <text:span text:style-name="T8">AS</text:span> procedimento_nome,</text:p>
      <text:p text:style-name="P17"><text:span text:style-name="T13">pr</text:span>.<text:span text:style-name="T13">Valor</text:span> <text:span text:style-name="T8">AS</text:span> procedimento_valor</text:p>
      <text:p text:style-name="P17"><text:span text:style-name="T8">FROM</text:span> Agendamento ag</text:p>
      <text:p text:style-name="P17"><text:span text:style-name="T8">JOIN</text:span> Cliente cl <text:span text:style-name="T8">ON</text:span> <text:span text:style-name="T13">cl</text:span>.<text:span text:style-name="T13">ID</text:span> <text:span text:style-name="T15">=</text:span> <text:span text:style-name="T13">ag</text:span>.<text:span text:style-name="T13">fk_Cliente</text:span></text:p>
      <text:p text:style-name="P17"><text:span text:style-name="T8">JOIN</text:span> Atendente <text:span text:style-name="T8">at</text:span> <text:span text:style-name="T8">ON</text:span> <text:span text:style-name="T8">at</text:span>.<text:span text:style-name="T8">ID</text:span> <text:span text:style-name="T15">=</text:span> <text:span text:style-name="T13">ag</text:span>.<text:span text:style-name="T13">fk_Atendente</text:span></text:p>
      <text:p text:style-name="P17"><text:span text:style-name="T8">LEFT</text:span> <text:span text:style-name="T8">JOIN</text:span> Pagamento pg <text:span text:style-name="T8">ON</text:span> <text:span text:style-name="T13">pg</text:span>.<text:span text:style-name="T13">ID</text:span> <text:span text:style-name="T15">=</text:span> <text:span text:style-name="T13">ag</text:span>.<text:span text:style-name="T13">fk_Pagamento</text:span></text:p>
      <text:p text:style-name="P17"><text:span text:style-name="T8">JOIN</text:span> Procedimento_Agendamento pa <text:span text:style-name="T8">ON</text:span> <text:span text:style-name="T13">pa</text:span>.<text:span text:style-name="T13">fk_Agendamento</text:span> <text:span text:style-name="T15">=</text:span> <text:span text:style-name="T13">ag</text:span>.<text:span text:style-name="T13">ID</text:span></text:p>
      <text:p text:style-name="P17"><text:span text:style-name="T8">JOIN</text:span> Procedimento pr <text:span text:style-name="T8">ON</text:span> <text:span text:style-name="T13">pr</text:span>.<text:span text:style-name="T13">ID</text:span> <text:span text:style-name="T15">=</text:span> <text:span text:style-name="T13">pa</text:span>.<text:span text:style-name="T13">fk_Procedimento</text:span>;</text:p>
      <text:p text:style-name="P17"/>
      <text:p text:style-name="P17"><text:soft-page-break/>-- =============================================</text:p>
      <text:p text:style-name="P17">-- CONSULTA 1: Faturamento total por mês</text:p>
      <text:p text:style-name="P17">-- Objetivo: acompanhar a evolução da receita ao longo do tempo</text:p>
      <text:p text:style-name="P17">-- =============================================</text:p>
      <text:p text:style-name="P17"><text:span text:style-name="T8">CREATE</text:span> <text:span text:style-name="T8">OR</text:span> <text:span text:style-name="T9">REPLACE</text:span> <text:span text:style-name="T8">VIEW</text:span> vw_faturamento_mensal <text:span text:style-name="T8">AS</text:span></text:p>
      <text:p text:style-name="P17">SELECT</text:p>
      <text:p text:style-name="P17">AnoMes,</text:p>
      <text:p text:style-name="P17">NomeMes,</text:p>
      <text:p text:style-name="P17">Ano,</text:p>
      <text:p text:style-name="P17">Mes,</text:p>
      <text:p text:style-name="P17"><text:span text:style-name="T9">COUNT</text:span>(<text:span text:style-name="T8">DISTINCT</text:span> agendamento_id) <text:span text:style-name="T8">AS</text:span> total_agendamentos,</text:p>
      <text:p text:style-name="P17"><text:span text:style-name="T9">SUM</text:span>(procedimento_valor) <text:span text:style-name="T8">AS</text:span> faturamento_bruto,</text:p>
      <text:p text:style-name="P17"><text:span text:style-name="T9">ROUND</text:span>(<text:span text:style-name="T9">AVG</text:span>(procedimento_valor), <text:span text:style-name="T10">2</text:span>) <text:span text:style-name="T8">AS</text:span> ticket_medio</text:p>
      <text:p text:style-name="P17"><text:span text:style-name="T8">FROM</text:span> vw_agendamentos_completo</text:p>
      <text:p text:style-name="P17"><text:span text:style-name="T8">GROUP</text:span> <text:span text:style-name="T8">BY</text:span> AnoMes, NomeMes, Ano, Mes</text:p>
      <text:p text:style-name="P17"><text:span text:style-name="T8">ORDER</text:span> <text:span text:style-name="T8">BY</text:span> AnoMes;</text:p>
      <text:p text:style-name="P17"/>
      <text:p text:style-name="P17"><text:span text:style-name="T8">SELECT</text:span> <text:span text:style-name="T15">*</text:span> <text:span text:style-name="T8">FROM</text:span> vw_faturamento_mensal;</text:p>
      <text:p text:style-name="P17"/>
      <text:p text:style-name="P17">-- =============================================</text:p>
      <text:p text:style-name="P17">-- CONSULTA 2: Procedimentos mais realizados e mais lucrativos</text:p>
      <text:p text:style-name="P17">-- Objetivo: identificar os serviços estrela do salão</text:p>
      <text:p text:style-name="P17">-- =============================================</text:p>
      <text:p text:style-name="P17"><text:span text:style-name="T8">CREATE</text:span> <text:span text:style-name="T8">OR</text:span> <text:span text:style-name="T9">REPLACE</text:span> <text:span text:style-name="T8">VIEW</text:span> vw_ranking_procedimentos <text:span text:style-name="T8">AS</text:span></text:p>
      <text:p text:style-name="P17">SELECT</text:p>
      <text:p text:style-name="P17">procedimento_nome,</text:p>
      <text:p text:style-name="P17"><text:span text:style-name="T9">COUNT</text:span>(<text:span text:style-name="T15">*</text:span>) <text:span text:style-name="T8">AS</text:span> vezes_realizado,</text:p>
      <text:p text:style-name="P17"><text:span text:style-name="T9">SUM</text:span>(procedimento_valor) <text:span text:style-name="T8">AS</text:span> receita_total,</text:p>
      <text:p text:style-name="P17"><text:span text:style-name="T9">ROUND</text:span>(<text:span text:style-name="T9">AVG</text:span>(procedimento_valor), <text:span text:style-name="T10">2</text:span>) <text:span text:style-name="T8">AS</text:span> valor_medio,</text:p>
      <text:p text:style-name="P17"><text:span text:style-name="T9">ROUND</text:span>(</text:p>
      <text:p text:style-name="P17"><text:span text:style-name="T9">COUNT</text:span>(<text:span text:style-name="T15">*</text:span>) <text:span text:style-name="T15">*</text:span> <text:span text:style-name="T10">100</text:span>.<text:span text:style-name="T10">0</text:span> <text:span text:style-name="T15">/</text:span> <text:span text:style-name="T9">SUM</text:span>(<text:span text:style-name="T9">COUNT</text:span>(<text:span text:style-name="T15">*</text:span>)) <text:span text:style-name="T8">OVER</text:span> <text:span text:style-name="T16">()</text:span>, <text:span text:style-name="T10">2</text:span></text:p>
      <text:p text:style-name="P17">) <text:span text:style-name="T8">AS</text:span> pct_participacao</text:p>
      <text:p text:style-name="P17"><text:span text:style-name="T8">FROM</text:span> vw_agendamentos_completo</text:p>
      <text:p text:style-name="P17"><text:span text:style-name="T8">GROUP</text:span> <text:span text:style-name="T8">BY</text:span> procedimento_nome</text:p>
      <text:p text:style-name="P17"><text:span text:style-name="T8">ORDER</text:span> <text:span text:style-name="T8">BY</text:span> receita_total <text:span text:style-name="T8">DESC</text:span>;</text:p>
      <text:p text:style-name="P17"/>
      <text:p text:style-name="P17"><text:span text:style-name="T8">SELECT</text:span> <text:span text:style-name="T15">*</text:span> <text:span text:style-name="T8">FROM</text:span> vw_ranking_procedimentos;</text:p>
      <text:p text:style-name="P17"/>
      <text:p text:style-name="P17">-- =============================================</text:p>
      <text:p text:style-name="P17"><text:soft-page-break/>-- CONSULTA 3: Desempenho de cada atendente</text:p>
      <text:p text:style-name="P17">-- Objetivo: avaliar produtividade e geração de receita por profissional</text:p>
      <text:p text:style-name="P17">-- =============================================</text:p>
      <text:p text:style-name="P17"><text:span text:style-name="T8">CREATE</text:span> <text:span text:style-name="T8">OR</text:span> <text:span text:style-name="T9">REPLACE</text:span> <text:span text:style-name="T8">VIEW</text:span> vw_desempenho_atendentes <text:span text:style-name="T8">AS</text:span></text:p>
      <text:p text:style-name="P17">SELECT</text:p>
      <text:p text:style-name="P17"><text:span text:style-name="T8">at</text:span>.<text:span text:style-name="T8">ID</text:span> <text:span text:style-name="T8">AS</text:span> atendente_id,</text:p>
      <text:p text:style-name="P17"><text:span text:style-name="T8">at</text:span>.Nome <text:span text:style-name="T8">AS</text:span> atendente_nome,</text:p>
      <text:p text:style-name="P17"><text:span text:style-name="T8">at</text:span>.Salario,</text:p>
      <text:p text:style-name="P17"><text:span text:style-name="T9">COUNT</text:span>(<text:span text:style-name="T8">DISTINCT</text:span> <text:span text:style-name="T13">ag</text:span>.<text:span text:style-name="T13">ID</text:span>) <text:span text:style-name="T8">AS</text:span> total_atendimentos,</text:p>
      <text:p text:style-name="P17"><text:span text:style-name="T9">SUM</text:span>(<text:span text:style-name="T13">pr</text:span>.<text:span text:style-name="T13">Valor</text:span>) <text:span text:style-name="T8">AS</text:span> receita_gerada,</text:p>
      <text:p text:style-name="P17"><text:span text:style-name="T9">ROUND</text:span>(<text:span text:style-name="T9">SUM</text:span>(<text:span text:style-name="T13">pr</text:span>.<text:span text:style-name="T13">Valor</text:span>) <text:span text:style-name="T15">/</text:span> <text:span text:style-name="T9">NULLIF</text:span>(<text:span text:style-name="T9">COUNT</text:span>(<text:span text:style-name="T8">DISTINCT</text:span> <text:span text:style-name="T13">ag</text:span>.<text:span text:style-name="T13">ID</text:span>), <text:span text:style-name="T10">0</text:span>), <text:span text:style-name="T10">2</text:span>) <text:span text:style-name="T8">AS</text:span> ticket_medio,</text:p>
      <text:p text:style-name="P17"><text:span text:style-name="T9">ROUND</text:span>(<text:span text:style-name="T9">SUM</text:span>(<text:span text:style-name="T13">pr</text:span>.<text:span text:style-name="T13">Valor</text:span>) <text:span text:style-name="T15">-</text:span> <text:span text:style-name="T8">at</text:span>.Salario, <text:span text:style-name="T10">2</text:span>) <text:span text:style-name="T8">AS</text:span> lucro_sobre_salario</text:p>
      <text:p text:style-name="P17"><text:span text:style-name="T8">FROM</text:span> Atendente <text:span text:style-name="T8">at</text:span></text:p>
      <text:p text:style-name="P17"><text:span text:style-name="T8">LEFT</text:span> <text:span text:style-name="T8">JOIN</text:span> Agendamento ag <text:span text:style-name="T8">ON</text:span> <text:span text:style-name="T13">ag</text:span>.<text:span text:style-name="T13">fk_Atendente</text:span> <text:span text:style-name="T15">=</text:span> <text:span text:style-name="T8">at</text:span>.<text:span text:style-name="T8">ID</text:span></text:p>
      <text:p text:style-name="P17"><text:span text:style-name="T8">LEFT</text:span> <text:span text:style-name="T8">JOIN</text:span> Procedimento_Agendamento pa <text:span text:style-name="T8">ON</text:span> <text:span text:style-name="T13">pa</text:span>.<text:span text:style-name="T13">fk_Agendamento</text:span> <text:span text:style-name="T15">=</text:span> <text:span text:style-name="T13">ag</text:span>.<text:span text:style-name="T13">ID</text:span></text:p>
      <text:p text:style-name="P17"><text:span text:style-name="T8">LEFT</text:span> <text:span text:style-name="T8">JOIN</text:span> Procedimento pr <text:span text:style-name="T8">ON</text:span> <text:span text:style-name="T13">pr</text:span>.<text:span text:style-name="T13">ID</text:span> <text:span text:style-name="T15">=</text:span> <text:span text:style-name="T13">pa</text:span>.<text:span text:style-name="T13">fk_Procedimento</text:span></text:p>
      <text:p text:style-name="P17"><text:span text:style-name="T8">WHERE</text:span> <text:span text:style-name="T8">at</text:span>.DataFinal <text:span text:style-name="T8">IS</text:span> <text:span text:style-name="T8">NULL</text:span> <text:span text:style-name="T17">-- apenas atendentes ativos</text:span></text:p>
      <text:p text:style-name="P17"><text:span text:style-name="T8">GROUP</text:span> <text:span text:style-name="T8">BY</text:span> <text:span text:style-name="T8">at</text:span>.<text:span text:style-name="T8">ID</text:span>, <text:span text:style-name="T8">at</text:span>.Nome, <text:span text:style-name="T8">at</text:span>.Salario</text:p>
      <text:p text:style-name="P17"><text:span text:style-name="T8">ORDER</text:span> <text:span text:style-name="T8">BY</text:span> receita_gerada <text:span text:style-name="T8">DESC</text:span>;</text:p>
      <text:p text:style-name="P17"/>
      <text:p text:style-name="P17"><text:span text:style-name="T8">SELECT</text:span> <text:span text:style-name="T15">*</text:span> <text:span text:style-name="T8">FROM</text:span> vw_desempenho_atendentes;</text:p>
      <text:p text:style-name="P17"/>
      <text:p text:style-name="P17">-- =============================================</text:p>
      <text:p text:style-name="P17">-- CONSULTA 4: Clientes mais frequentes (ranking de fidelidade)</text:p>
      <text:p text:style-name="P17">-- Objetivo: base para programa de fidelidade</text:p>
      <text:p text:style-name="P17">-- =============================================</text:p>
      <text:p text:style-name="P17"><text:span text:style-name="T8">CREATE</text:span> <text:span text:style-name="T8">OR</text:span> <text:span text:style-name="T9">REPLACE</text:span> <text:span text:style-name="T8">VIEW</text:span> vw_clientes_frequentes <text:span text:style-name="T8">AS</text:span></text:p>
      <text:p text:style-name="P17">SELECT</text:p>
      <text:p text:style-name="P17"><text:span text:style-name="T13">cl</text:span>.<text:span text:style-name="T13">ID</text:span> <text:span text:style-name="T8">AS</text:span> cliente_id,</text:p>
      <text:p text:style-name="P17"><text:span text:style-name="T13">cl</text:span>.<text:span text:style-name="T13">Nome</text:span> <text:span text:style-name="T8">AS</text:span> cliente_nome,</text:p>
      <text:p text:style-name="P17"><text:span text:style-name="T13">cl</text:span>.<text:span text:style-name="T13">Email</text:span>,</text:p>
      <text:p text:style-name="P17"><text:span text:style-name="T13">cl</text:span>.<text:span text:style-name="T13">DataCadastro</text:span>,</text:p>
      <text:p text:style-name="P17"><text:span text:style-name="T9">COUNT</text:span>(<text:span text:style-name="T8">DISTINCT</text:span> <text:span text:style-name="T13">ag</text:span>.<text:span text:style-name="T13">ID</text:span>) <text:span text:style-name="T8">AS</text:span> total_visitas,</text:p>
      <text:p text:style-name="P17"><text:span text:style-name="T9">SUM</text:span>(<text:span text:style-name="T13">pg</text:span>.<text:span text:style-name="T13">Valor</text:span>) <text:span text:style-name="T8">AS</text:span> total_gasto,</text:p>
      <text:p text:style-name="P17"><text:span text:style-name="T9">ROUND</text:span>(<text:span text:style-name="T9">AVG</text:span>(<text:span text:style-name="T13">pg</text:span>.<text:span text:style-name="T13">Valor</text:span>), <text:span text:style-name="T10">2</text:span>) <text:span text:style-name="T8">AS</text:span> gasto_medio_por_visita,</text:p>
      <text:p text:style-name="P17"><text:span text:style-name="T9">MAX</text:span>(<text:span text:style-name="T8">DATE</text:span>(<text:span text:style-name="T13">ag</text:span>.<text:span text:style-name="T13">Horario</text:span>)) <text:span text:style-name="T8">AS</text:span> ultima_visita,</text:p>
      <text:p text:style-name="P17"><text:span text:style-name="T8">CURRENT_DATE</text:span> <text:span text:style-name="T15">-</text:span> <text:span text:style-name="T9">MAX</text:span>(<text:span text:style-name="T8">DATE</text:span>(<text:span text:style-name="T13">ag</text:span>.<text:span text:style-name="T13">Horario</text:span>)) <text:span text:style-name="T8">AS</text:span> dias_sem_visita</text:p>
      <text:p text:style-name="P17"><text:span text:style-name="T8">FROM</text:span> Cliente cl</text:p>
      <text:p text:style-name="P17"><text:span text:style-name="T8">LEFT</text:span> <text:span text:style-name="T8">JOIN</text:span> Agendamento ag <text:span text:style-name="T8">ON</text:span> <text:span text:style-name="T13">ag</text:span>.<text:span text:style-name="T13">fk_Cliente</text:span> <text:span text:style-name="T15">=</text:span> <text:span text:style-name="T13">cl</text:span>.<text:span text:style-name="T13">ID</text:span></text:p>
      <text:p text:style-name="P17"><text:soft-page-break/><text:span text:style-name="T8">LEFT</text:span> <text:span text:style-name="T8">JOIN</text:span> Pagamento pg <text:span text:style-name="T8">ON</text:span> <text:span text:style-name="T13">pg</text:span>.<text:span text:style-name="T13">ID</text:span> <text:span text:style-name="T15">=</text:span> <text:span text:style-name="T13">ag</text:span>.<text:span text:style-name="T13">fk_Pagamento</text:span></text:p>
      <text:p text:style-name="P17"><text:span text:style-name="T8">GROUP</text:span> <text:span text:style-name="T8">BY</text:span> <text:span text:style-name="T13">cl</text:span>.<text:span text:style-name="T13">ID</text:span>, <text:span text:style-name="T13">cl</text:span>.<text:span text:style-name="T13">Nome</text:span>, <text:span text:style-name="T13">cl</text:span>.<text:span text:style-name="T13">Email</text:span>, <text:span text:style-name="T13">cl</text:span>.<text:span text:style-name="T13">DataCadastro</text:span></text:p>
      <text:p text:style-name="P17"><text:span text:style-name="T8">ORDER</text:span> <text:span text:style-name="T8">BY</text:span> total_visitas <text:span text:style-name="T8">DESC</text:span>, total_gasto <text:span text:style-name="T8">DESC</text:span>;</text:p>
      <text:p text:style-name="P17"/>
      <text:p text:style-name="P17"><text:span text:style-name="T8">SELECT</text:span> <text:span text:style-name="T15">*</text:span> <text:span text:style-name="T8">FROM</text:span> vw_clientes_frequentes;</text:p>
      <text:p text:style-name="P17"/>
      <text:p text:style-name="P17">-- =============================================</text:p>
      <text:p text:style-name="P17">-- CONSULTA 5: Distribuição dos meios de pagamento</text:p>
      <text:p text:style-name="P17">-- Objetivo: entender preferências de pagamento dos clientes</text:p>
      <text:p text:style-name="P17">-- =============================================</text:p>
      <text:p text:style-name="P17"><text:span text:style-name="T8">CREATE</text:span> <text:span text:style-name="T8">OR</text:span> <text:span text:style-name="T9">REPLACE</text:span> <text:span text:style-name="T8">VIEW</text:span> vw_meios_pagamento <text:span text:style-name="T8">AS</text:span></text:p>
      <text:p text:style-name="P17">SELECT</text:p>
      <text:p text:style-name="P17"><text:span text:style-name="T13">pg</text:span>.<text:span text:style-name="T13">Tipo</text:span> <text:span text:style-name="T8">AS</text:span> meio_pagamento,</text:p>
      <text:p text:style-name="P17"><text:span text:style-name="T9">COUNT</text:span>(<text:span text:style-name="T15">*</text:span>) <text:span text:style-name="T8">AS</text:span> quantidade,</text:p>
      <text:p text:style-name="P17"><text:span text:style-name="T9">SUM</text:span>(<text:span text:style-name="T13">pg</text:span>.<text:span text:style-name="T13">Valor</text:span>) <text:span text:style-name="T8">AS</text:span> valor_total,</text:p>
      <text:p text:style-name="P17"><text:span text:style-name="T9">ROUND</text:span>(<text:span text:style-name="T9">AVG</text:span>(<text:span text:style-name="T13">pg</text:span>.<text:span text:style-name="T13">Valor</text:span>), <text:span text:style-name="T10">2</text:span>) <text:span text:style-name="T8">AS</text:span> valor_medio,</text:p>
      <text:p text:style-name="P17"><text:span text:style-name="T9">ROUND</text:span>(</text:p>
      <text:p text:style-name="P17"><text:span text:style-name="T9">COUNT</text:span>(<text:span text:style-name="T15">*</text:span>) <text:span text:style-name="T15">*</text:span> <text:span text:style-name="T10">100</text:span>.<text:span text:style-name="T10">0</text:span> <text:span text:style-name="T15">/</text:span> <text:span text:style-name="T9">SUM</text:span>(<text:span text:style-name="T9">COUNT</text:span>(<text:span text:style-name="T15">*</text:span>)) <text:span text:style-name="T8">OVER</text:span> <text:span text:style-name="T16">()</text:span>, <text:span text:style-name="T10">2</text:span></text:p>
      <text:p text:style-name="P17">) <text:span text:style-name="T8">AS</text:span> pct_uso</text:p>
      <text:p text:style-name="P17"><text:span text:style-name="T8">FROM</text:span> Pagamento pg</text:p>
      <text:p text:style-name="P17"><text:span text:style-name="T8">JOIN</text:span> Agendamento ag <text:span text:style-name="T8">ON</text:span> <text:span text:style-name="T13">ag</text:span>.<text:span text:style-name="T13">fk_Pagamento</text:span> <text:span text:style-name="T15">=</text:span> <text:span text:style-name="T13">pg</text:span>.<text:span text:style-name="T13">ID</text:span></text:p>
      <text:p text:style-name="P17"><text:span text:style-name="T8">GROUP</text:span> <text:span text:style-name="T8">BY</text:span> <text:span text:style-name="T13">pg</text:span>.<text:span text:style-name="T13">Tipo</text:span></text:p>
      <text:p text:style-name="P17"><text:span text:style-name="T8">ORDER</text:span> <text:span text:style-name="T8">BY</text:span> quantidade <text:span text:style-name="T8">DESC</text:span>;</text:p>
      <text:p text:style-name="P17"/>
      <text:p text:style-name="P17"><text:span text:style-name="T8">SELECT</text:span> <text:span text:style-name="T15">*</text:span> <text:span text:style-name="T8">FROM</text:span> vw_meios_pagamento;</text:p>
      <text:p text:style-name="P17"/>
      <text:p text:style-name="P17">-- =============================================</text:p>
      <text:p text:style-name="P17">-- CONSULTA 6: Horários de pico — agendamentos por dia da semana e turno</text:p>
      <text:p text:style-name="P17">-- Objetivo: apoiar escala de atendentes</text:p>
      <text:p text:style-name="P17">-- =============================================</text:p>
      <text:p text:style-name="P17"><text:span text:style-name="T8">CREATE</text:span> <text:span text:style-name="T8">OR</text:span> <text:span text:style-name="T9">REPLACE</text:span> <text:span text:style-name="T8">VIEW</text:span> vw_horarios_pico <text:span text:style-name="T8">AS</text:span></text:p>
      <text:p text:style-name="P17">SELECT</text:p>
      <text:p text:style-name="P17"><text:span text:style-name="T9">TO_CHAR</text:span>(Horario, <text:span text:style-name="T14">'Day'</text:span>) <text:span text:style-name="T8">AS</text:span> dia_semana,</text:p>
      <text:p text:style-name="P17"><text:span text:style-name="T9">EXTRACT</text:span>(DOW <text:span text:style-name="T8">FROM</text:span> Horario) <text:span text:style-name="T8">AS</text:span> num_dia, <text:span text:style-name="T17">-- 0=Dom ... 6=Sáb</text:span></text:p>
      <text:p text:style-name="P17">CASE</text:p>
      <text:p text:style-name="P17"><text:span text:style-name="T8">WHEN</text:span> <text:span text:style-name="T9">EXTRACT</text:span>(<text:span text:style-name="T8">HOUR</text:span> <text:span text:style-name="T8">FROM</text:span> Horario) <text:span text:style-name="T8">BETWEEN</text:span> <text:span text:style-name="T10">8</text:span> <text:span text:style-name="T8">AND</text:span> <text:span text:style-name="T10">11</text:span> <text:span text:style-name="T8">THEN</text:span> <text:span text:style-name="T14">'Manhã'</text:span></text:p>
      <text:p text:style-name="P17"><text:span text:style-name="T8">WHEN</text:span> <text:span text:style-name="T9">EXTRACT</text:span>(<text:span text:style-name="T8">HOUR</text:span> <text:span text:style-name="T8">FROM</text:span> Horario) <text:span text:style-name="T8">BETWEEN</text:span> <text:span text:style-name="T10">12</text:span> <text:span text:style-name="T8">AND</text:span> <text:span text:style-name="T10">13</text:span> <text:span text:style-name="T8">THEN</text:span> <text:span text:style-name="T14">'Almoço'</text:span></text:p>
      <text:p text:style-name="P17"><text:span text:style-name="T8">WHEN</text:span> <text:span text:style-name="T9">EXTRACT</text:span>(<text:span text:style-name="T8">HOUR</text:span> <text:span text:style-name="T8">FROM</text:span> Horario) <text:span text:style-name="T8">BETWEEN</text:span> <text:span text:style-name="T10">14</text:span> <text:span text:style-name="T8">AND</text:span> <text:span text:style-name="T10">17</text:span> <text:span text:style-name="T8">THEN</text:span> <text:span text:style-name="T14">'Tarde'</text:span></text:p>
      <text:p text:style-name="P17"><text:span text:style-name="T8">ELSE</text:span> <text:span text:style-name="T14">'Noite'</text:span></text:p>
      <text:p text:style-name="P17"><text:soft-page-break/><text:span text:style-name="T8">END</text:span> <text:span text:style-name="T8">AS</text:span> turno,</text:p>
      <text:p text:style-name="P17"><text:span text:style-name="T9">COUNT</text:span>(<text:span text:style-name="T15">*</text:span>) <text:span text:style-name="T8">AS</text:span> agendamentos</text:p>
      <text:p text:style-name="P17"><text:span text:style-name="T8">FROM</text:span> Agendamento</text:p>
      <text:p text:style-name="P17"><text:span text:style-name="T8">GROUP</text:span> <text:span text:style-name="T8">BY</text:span> dia_semana, num_dia, turno</text:p>
      <text:p text:style-name="P17"><text:span text:style-name="T8">ORDER</text:span> <text:span text:style-name="T8">BY</text:span> num_dia, turno;</text:p>
      <text:p text:style-name="P17"/>
      <text:p text:style-name="P17"><text:span text:style-name="T8">SELECT</text:span> <text:span text:style-name="T15">*</text:span> <text:span text:style-name="T8">FROM</text:span> vw_horarios_pico;</text:p>
      <text:p text:style-name="P17"/>
      <text:p text:style-name="P17">-- =============================================</text:p>
      <text:p text:style-name="P17">-- CONSULTA 7: Especialidades mais demandadas por atendente</text:p>
      <text:p text:style-name="P17">-- Objetivo: identificar gaps de cobertura e super-especialistas</text:p>
      <text:p text:style-name="P17">-- =============================================</text:p>
      <text:p text:style-name="P17">SELECT</text:p>
      <text:p text:style-name="P17"><text:span text:style-name="T8">at</text:span>.Nome <text:span text:style-name="T8">AS</text:span> atendente,</text:p>
      <text:p text:style-name="P17"><text:span text:style-name="T13">esp</text:span>.<text:span text:style-name="T13">Nome</text:span> <text:span text:style-name="T8">AS</text:span> especialidade,</text:p>
      <text:p text:style-name="P17"><text:span text:style-name="T9">COUNT</text:span>(<text:span text:style-name="T8">DISTINCT</text:span> <text:span text:style-name="T13">pa</text:span>.<text:span text:style-name="T13">fk_Agendamento</text:span>) <text:span text:style-name="T8">AS</text:span> agendamentos_na_especialidade</text:p>
      <text:p text:style-name="P17"><text:span text:style-name="T8">FROM</text:span> Atendente <text:span text:style-name="T8">at</text:span></text:p>
      <text:p text:style-name="P17"><text:span text:style-name="T8">JOIN</text:span> Atendente_Especialidade ae <text:span text:style-name="T8">ON</text:span> <text:span text:style-name="T13">ae</text:span>.<text:span text:style-name="T13">fk_Atendente</text:span> <text:span text:style-name="T15">=</text:span> <text:span text:style-name="T8">at</text:span>.<text:span text:style-name="T8">ID</text:span></text:p>
      <text:p text:style-name="P17"><text:span text:style-name="T8">JOIN</text:span> Especialidade esp <text:span text:style-name="T8">ON</text:span> <text:span text:style-name="T13">esp</text:span>.<text:span text:style-name="T13">ID</text:span> <text:span text:style-name="T15">=</text:span> <text:span text:style-name="T13">ae</text:span>.<text:span text:style-name="T13">fk_Especialidade</text:span></text:p>
      <text:p text:style-name="P17"><text:span text:style-name="T8">LEFT</text:span> <text:span text:style-name="T8">JOIN</text:span> Agendamento ag <text:span text:style-name="T8">ON</text:span> <text:span text:style-name="T13">ag</text:span>.<text:span text:style-name="T13">fk_Atendente</text:span> <text:span text:style-name="T15">=</text:span> <text:span text:style-name="T8">at</text:span>.<text:span text:style-name="T8">ID</text:span></text:p>
      <text:p text:style-name="P17"><text:span text:style-name="T8">LEFT</text:span> <text:span text:style-name="T8">JOIN</text:span> Procedimento_Agendamento pa <text:span text:style-name="T8">ON</text:span> <text:span text:style-name="T13">pa</text:span>.<text:span text:style-name="T13">fk_Agendamento</text:span> <text:span text:style-name="T15">=</text:span> <text:span text:style-name="T13">ag</text:span>.<text:span text:style-name="T13">ID</text:span></text:p>
      <text:p text:style-name="P17"><text:span text:style-name="T8">LEFT</text:span> <text:span text:style-name="T8">JOIN</text:span> Procedimento pr <text:span text:style-name="T8">ON</text:span> <text:span text:style-name="T13">pr</text:span>.<text:span text:style-name="T13">ID</text:span> <text:span text:style-name="T15">=</text:span> <text:span text:style-name="T13">pa</text:span>.<text:span text:style-name="T13">fk_Procedimento</text:span></text:p>
      <text:p text:style-name="P17"><text:span text:style-name="T8">AND</text:span> <text:span text:style-name="T13">pr</text:span>.<text:span text:style-name="T13">Nome</text:span> <text:span text:style-name="T15">=</text:span> <text:span text:style-name="T13">esp</text:span>.<text:span text:style-name="T13">Nome</text:span></text:p>
      <text:p text:style-name="P17"><text:span text:style-name="T8">GROUP</text:span> <text:span text:style-name="T8">BY</text:span> <text:span text:style-name="T8">at</text:span>.Nome, <text:span text:style-name="T13">esp</text:span>.<text:span text:style-name="T13">Nome</text:span></text:p>
      <text:p text:style-name="P17"><text:span text:style-name="T8">ORDER</text:span> <text:span text:style-name="T8">BY</text:span> <text:span text:style-name="T8">at</text:span>.Nome, agendamentos_na_especialidade <text:span text:style-name="T8">DESC</text:span>;</text:p>
      <text:p text:style-name="P17"/>
      <text:p text:style-name="P17">-- =============================================</text:p>
      <text:p text:style-name="P17">-- CONSULTA 8: Clientes em risco de churn (sem visita há mais de 60 dias)</text:p>
      <text:p text:style-name="P17">-- Objetivo: acionar campanhas de retenção</text:p>
      <text:p text:style-name="P17">-- =============================================</text:p>
      <text:p text:style-name="P17">SELECT</text:p>
      <text:p text:style-name="P17"><text:span text:style-name="T13">cl</text:span>.<text:span text:style-name="T13">Nome</text:span> <text:span text:style-name="T8">AS</text:span> cliente,</text:p>
      <text:p text:style-name="P17"><text:span text:style-name="T13">cl</text:span>.<text:span text:style-name="T13">Email</text:span>,</text:p>
      <text:p text:style-name="P17"><text:span text:style-name="T13">cl</text:span>.<text:span text:style-name="T13">Telefone</text:span>,</text:p>
      <text:p text:style-name="P17"><text:span text:style-name="T9">MAX</text:span>(<text:span text:style-name="T8">DATE</text:span>(<text:span text:style-name="T13">ag</text:span>.<text:span text:style-name="T13">Horario</text:span>)) <text:span text:style-name="T8">AS</text:span> ultima_visita,</text:p>
      <text:p text:style-name="P17"><text:span text:style-name="T8">CURRENT_DATE</text:span> <text:span text:style-name="T15">-</text:span> <text:span text:style-name="T9">MAX</text:span>(<text:span text:style-name="T8">DATE</text:span>(<text:span text:style-name="T13">ag</text:span>.<text:span text:style-name="T13">Horario</text:span>)) <text:span text:style-name="T8">AS</text:span> dias_ausente,</text:p>
      <text:p text:style-name="P17"><text:span text:style-name="T9">COUNT</text:span>(<text:span text:style-name="T13">ag</text:span>.<text:span text:style-name="T13">ID</text:span>) <text:span text:style-name="T8">AS</text:span> total_visitas_historico</text:p>
      <text:p text:style-name="P17"><text:span text:style-name="T8">FROM</text:span> Cliente cl</text:p>
      <text:p text:style-name="P17"><text:span text:style-name="T8">LEFT</text:span> <text:span text:style-name="T8">JOIN</text:span> Agendamento ag <text:span text:style-name="T8">ON</text:span> <text:span text:style-name="T13">ag</text:span>.<text:span text:style-name="T13">fk_Cliente</text:span> <text:span text:style-name="T15">=</text:span> <text:span text:style-name="T13">cl</text:span>.<text:span text:style-name="T13">ID</text:span></text:p>
      <text:p text:style-name="P17"><text:soft-page-break/><text:span text:style-name="T8">GROUP</text:span> <text:span text:style-name="T8">BY</text:span> <text:span text:style-name="T13">cl</text:span>.<text:span text:style-name="T13">ID</text:span>, <text:span text:style-name="T13">cl</text:span>.<text:span text:style-name="T13">Nome</text:span>, <text:span text:style-name="T13">cl</text:span>.<text:span text:style-name="T13">Email</text:span>, <text:span text:style-name="T13">cl</text:span>.<text:span text:style-name="T13">Telefone</text:span></text:p>
      <text:p text:style-name="P17"><text:span text:style-name="T8">HAVING</text:span> <text:span text:style-name="T8">CURRENT_DATE</text:span> <text:span text:style-name="T15">-</text:span> <text:span text:style-name="T9">MAX</text:span>(<text:span text:style-name="T8">DATE</text:span>(<text:span text:style-name="T13">ag</text:span>.<text:span text:style-name="T13">Horario</text:span>)) <text:span text:style-name="T15">&gt;</text:span> <text:span text:style-name="T10">60</text:span></text:p>
      <text:p text:style-name="P17"><text:span text:style-name="T8">OR</text:span> <text:span text:style-name="T9">MAX</text:span>(<text:span text:style-name="T13">ag</text:span>.<text:span text:style-name="T13">ID</text:span>) <text:span text:style-name="T8">IS</text:span> <text:span text:style-name="T8">NULL</text:span></text:p>
      <text:p text:style-name="P17"><text:span text:style-name="T8">ORDER</text:span> <text:span text:style-name="T8">BY</text:span> dias_ausente <text:span text:style-name="T8">DESC</text:span> <text:span text:style-name="T8">NULLS</text:span> <text:span text:style-name="T8">FIRST</text:span>;</text:p>
      <text:p text:style-name="P17"/>
      <text:p text:style-name="P17">-- =============================================</text:p>
      <text:p text:style-name="P17">-- CONSULTA 9: Ticket médio por combinação de procedimentos</text:p>
      <text:p text:style-name="P17">-- Objetivo: identificar combos mais rentáveis para promover</text:p>
      <text:p text:style-name="P17">-- =============================================</text:p>
      <text:p text:style-name="P17">SELECT</text:p>
      <text:p text:style-name="P17"><text:span text:style-name="T9">STRING_AGG</text:span>(<text:span text:style-name="T13">pr</text:span>.<text:span text:style-name="T13">Nome</text:span>, <text:span text:style-name="T14">' + '</text:span> <text:span text:style-name="T8">ORDER</text:span> <text:span text:style-name="T8">BY</text:span> <text:span text:style-name="T13">pr</text:span>.<text:span text:style-name="T13">Nome</text:span>) <text:span text:style-name="T8">AS</text:span> combo_procedimentos,</text:p>
      <text:p text:style-name="P17"><text:span text:style-name="T9">COUNT</text:span>(<text:span text:style-name="T15">*</text:span>) <text:span text:style-name="T8">AS</text:span> vezes_realizado,</text:p>
      <text:p text:style-name="P17"><text:span text:style-name="T9">SUM</text:span>(<text:span text:style-name="T13">pr</text:span>.<text:span text:style-name="T13">Valor</text:span>) <text:span text:style-name="T8">AS</text:span> receita_total,</text:p>
      <text:p text:style-name="P17"><text:span text:style-name="T9">ROUND</text:span>(<text:span text:style-name="T9">AVG</text:span>(<text:span text:style-name="T13">pr</text:span>.<text:span text:style-name="T13">Valor</text:span>), <text:span text:style-name="T10">2</text:span>) <text:span text:style-name="T8">AS</text:span> valor_medio_por_item</text:p>
      <text:p text:style-name="P17"><text:span text:style-name="T8">FROM</text:span> Procedimento_Agendamento pa</text:p>
      <text:p text:style-name="P17"><text:span text:style-name="T8">JOIN</text:span> Procedimento pr <text:span text:style-name="T8">ON</text:span> <text:span text:style-name="T13">pr</text:span>.<text:span text:style-name="T13">ID</text:span> <text:span text:style-name="T15">=</text:span> <text:span text:style-name="T13">pa</text:span>.<text:span text:style-name="T13">fk_Procedimento</text:span></text:p>
      <text:p text:style-name="P17"><text:span text:style-name="T8">JOIN</text:span> (</text:p>
      <text:p text:style-name="P17">-- Apenas agendamentos com mais de 1 procedimento</text:p>
      <text:p text:style-name="P17"><text:span text:style-name="T8">SELECT</text:span> fk_Agendamento</text:p>
      <text:p text:style-name="P17"><text:span text:style-name="T8">FROM</text:span> Procedimento_Agendamento</text:p>
      <text:p text:style-name="P17"><text:span text:style-name="T8">GROUP</text:span> <text:span text:style-name="T8">BY</text:span> fk_Agendamento</text:p>
      <text:p text:style-name="P17"><text:span text:style-name="T8">HAVING</text:span> <text:span text:style-name="T9">COUNT</text:span>(<text:span text:style-name="T15">*</text:span>) <text:span text:style-name="T15">&gt;</text:span> <text:span text:style-name="T10">1</text:span></text:p>
      <text:p text:style-name="P17">) combos <text:span text:style-name="T8">ON</text:span> <text:span text:style-name="T13">combos</text:span>.<text:span text:style-name="T13">fk_Agendamento</text:span> <text:span text:style-name="T15">=</text:span> <text:span text:style-name="T13">pa</text:span>.<text:span text:style-name="T13">fk_Agendamento</text:span></text:p>
      <text:p text:style-name="P17"><text:span text:style-name="T8">GROUP</text:span> <text:span text:style-name="T8">BY</text:span> <text:span text:style-name="T13">pa</text:span>.<text:span text:style-name="T13">fk_Agendamento</text:span></text:p>
      <text:p text:style-name="P17"><text:span text:style-name="T8">ORDER</text:span> <text:span text:style-name="T8">BY</text:span> receita_total <text:span text:style-name="T8">DESC</text:span>;</text:p>
      <text:p text:style-name="P17"/>
      <text:p text:style-name="P17">-- =============================================</text:p>
      <text:p text:style-name="P17">-- CONSULTA 10: Comparativo mensal — mês atual vs mês anterior</text:p>
      <text:p text:style-name="P17">-- Objetivo: KPI principal do dashboard (crescimento MoM)</text:p>
      <text:p text:style-name="P17">-- =============================================</text:p>
      <text:p text:style-name="P17"><text:span text:style-name="T8">WITH</text:span> receita_por_mes <text:span text:style-name="T8">AS</text:span> (</text:p>
      <text:p text:style-name="P17">SELECT</text:p>
      <text:p text:style-name="P17"><text:span text:style-name="T9">TO_CHAR</text:span>(<text:span text:style-name="T13">ag</text:span>.<text:span text:style-name="T13">Horario</text:span>, <text:span text:style-name="T14">'YYYY-MM'</text:span>) <text:span text:style-name="T8">AS</text:span> ano_mes,</text:p>
      <text:p text:style-name="P17"><text:span text:style-name="T9">SUM</text:span>(<text:span text:style-name="T13">pg</text:span>.<text:span text:style-name="T13">Valor</text:span>) <text:span text:style-name="T8">AS</text:span> receita,</text:p>
      <text:p text:style-name="P17"><text:span text:style-name="T9">COUNT</text:span>(<text:span text:style-name="T8">DISTINCT</text:span> <text:span text:style-name="T13">ag</text:span>.<text:span text:style-name="T13">ID</text:span>) <text:span text:style-name="T8">AS</text:span> agendamentos</text:p>
      <text:p text:style-name="P17"><text:span text:style-name="T8">FROM</text:span> Agendamento ag</text:p>
      <text:p text:style-name="P17"><text:span text:style-name="T8">JOIN</text:span> Pagamento pg <text:span text:style-name="T8">ON</text:span> <text:span text:style-name="T13">pg</text:span>.<text:span text:style-name="T13">ID</text:span> <text:span text:style-name="T15">=</text:span> <text:span text:style-name="T13">ag</text:span>.<text:span text:style-name="T13">fk_Pagamento</text:span></text:p>
      <text:p text:style-name="P17"><text:span text:style-name="T8">GROUP</text:span> <text:span text:style-name="T8">BY</text:span> ano_mes</text:p>
      <text:p text:style-name="P17">)</text:p>
      <text:p text:style-name="P17"><text:soft-page-break/>SELECT</text:p>
      <text:p text:style-name="P17"><text:span text:style-name="T13">atual</text:span>.<text:span text:style-name="T13">ano_mes</text:span>,</text:p>
      <text:p text:style-name="P17"><text:span text:style-name="T13">atual</text:span>.<text:span text:style-name="T13">agendamentos</text:span> <text:span text:style-name="T8">AS</text:span> agendamentos_atual,</text:p>
      <text:p text:style-name="P17"><text:span text:style-name="T13">anterior</text:span>.<text:span text:style-name="T13">agendamentos</text:span> <text:span text:style-name="T8">AS</text:span> agendamentos_anterior,</text:p>
      <text:p text:style-name="P17"><text:span text:style-name="T13">atual</text:span>.<text:span text:style-name="T13">receita</text:span> <text:span text:style-name="T8">AS</text:span> receita_atual,</text:p>
      <text:p text:style-name="P17"><text:span text:style-name="T13">anterior</text:span>.<text:span text:style-name="T13">receita</text:span> <text:span text:style-name="T8">AS</text:span> receita_anterior,</text:p>
      <text:p text:style-name="P17"><text:span text:style-name="T13">atual</text:span>.<text:span text:style-name="T13">receita</text:span> <text:span text:style-name="T15">-</text:span> <text:span text:style-name="T13">anterior</text:span>.<text:span text:style-name="T13">receita</text:span> <text:span text:style-name="T8">AS</text:span> variacao_absoluta,</text:p>
      <text:p text:style-name="P17"><text:span text:style-name="T9">ROUND</text:span>(</text:p>
      <text:p text:style-name="P17">(<text:span text:style-name="T13">atual</text:span>.<text:span text:style-name="T13">receita</text:span> <text:span text:style-name="T15">-</text:span> <text:span text:style-name="T13">anterior</text:span>.<text:span text:style-name="T13">receita</text:span>)</text:p>
      <text:p text:style-name="P17"><text:span text:style-name="T15">/</text:span> <text:span text:style-name="T9">NULLIF</text:span>(<text:span text:style-name="T13">anterior</text:span>.<text:span text:style-name="T13">receita</text:span>, <text:span text:style-name="T10">0</text:span>) <text:span text:style-name="T15">*</text:span> <text:span text:style-name="T10">100</text:span>, <text:span text:style-name="T10">2</text:span></text:p>
      <text:p text:style-name="P17">) <text:span text:style-name="T8">AS</text:span> variacao_pct</text:p>
      <text:p text:style-name="P17"><text:span text:style-name="T8">FROM</text:span> receita_por_mes atual</text:p>
      <text:p text:style-name="P17"><text:span text:style-name="T8">LEFT</text:span> <text:span text:style-name="T8">JOIN</text:span> receita_por_mes anterior</text:p>
      <text:p text:style-name="P17"><text:span text:style-name="T8">ON</text:span> <text:span text:style-name="T13">anterior</text:span>.<text:span text:style-name="T13">ano_mes</text:span> <text:span text:style-name="T15">=</text:span> <text:span text:style-name="T9">TO_CHAR</text:span>(</text:p>
      <text:p text:style-name="P17"><text:span text:style-name="T9">TO_DATE</text:span>(<text:span text:style-name="T13">atual</text:span>.<text:span text:style-name="T13">ano_mes</text:span>, <text:span text:style-name="T14">'YYYY-MM'</text:span>) <text:span text:style-name="T15">-</text:span> <text:span text:style-name="T8">INTERVAL</text:span> <text:span text:style-name="T14">'1 month'</text:span>,</text:p>
      <text:p text:style-name="P17">'YYYY-MM'</text:p>
      <text:p text:style-name="P17">)</text:p>
      <text:p text:style-name="P17"><text:span text:style-name="T8">ORDER</text:span> <text:span text:style-name="T8">BY</text:span> <text:span text:style-name="T13">atual</text:span>.<text:span text:style-name="T13">ano_mes</text:span>;</text:p>
      <text:p text:style-name="Text_20_body"><text:span text:style-name="Source_20_Text"><text:span text:style-name="T12"/></text:span></text:p>
      <text:p text:style-name="P19"><text:span text:style-name="Source_20_Text"><text:span text:style-name="T18"><draw:frame draw:style-name="fr2" draw:name="Frame1" text:anchor-type="as-char" draw:z-index="1"><draw:text-box fo:min-height="0in" fo:min-width="0in"><text:h text:style-name="P20" text:outline-level="2"><text:span text:style-name="Source_20_Text">Extra: Script de Povoamento:</text:span></text:h></draw:text-box></draw:frame></text:span></text:span></text:p>
      <text:p text:style-name="P21"><text:span text:style-name="Source_20_Text"><text:span text:style-name="T18"><text:line-break/></text:span></text:span><text:span text:style-name="Source_20_Text"><text:span text:style-name="T19">-- =============================================</text:span></text:span></text:p>
      <text:p text:style-name="P17">-- POVOAMENTO</text:p>
      <text:p text:style-name="P17">-- =============================================</text:p>
      <text:p text:style-name="P17"/>
      <text:p text:style-name="P17">-- Especialidades (10 registros)</text:p>
      <text:p text:style-name="P17"><text:span text:style-name="T8">INSERT</text:span> <text:span text:style-name="T8">INTO</text:span> Especialidade (Nome) <text:span text:style-name="T9">VALUES</text:span></text:p>
      <text:p text:style-name="P17">(<text:span text:style-name="T14">'Corte Feminino'</text:span>),</text:p>
      <text:p text:style-name="P17">(<text:span text:style-name="T14">'Corte Masculino'</text:span>),</text:p>
      <text:p text:style-name="P17">(<text:span text:style-name="T14">'Coloração'</text:span>),</text:p>
      <text:p text:style-name="P17">(<text:span text:style-name="T14">'Manicure'</text:span>),</text:p>
      <text:p text:style-name="P17">(<text:span text:style-name="T14">'Pedicure'</text:span>),</text:p>
      <text:p text:style-name="P17">(<text:span text:style-name="T14">'Depilação'</text:span>),</text:p>
      <text:p text:style-name="P17">(<text:span text:style-name="T14">'Maquiagem'</text:span>),</text:p>
      <text:p text:style-name="P17">(<text:span text:style-name="T14">'Hidratação Capilar'</text:span>),</text:p>
      <text:p text:style-name="P17">(<text:span text:style-name="T14">'Design de Sobrancelha'</text:span>),</text:p>
      <text:p text:style-name="P17">(<text:span text:style-name="T14">'Escova Progressiva'</text:span>);</text:p>
      <text:p text:style-name="P17"/>
      <text:p text:style-name="P17"><text:soft-page-break/>-- Atendentes (15 registros)</text:p>
      <text:p text:style-name="P17"><text:span text:style-name="T8">INSERT</text:span> <text:span text:style-name="T8">INTO</text:span> Atendente (Nome, AnoNasc, DataInicio, DataFinal, Salario, Telefone) <text:span text:style-name="T9">VALUES</text:span></text:p>
      <text:p text:style-name="P17">(<text:span text:style-name="T14">'Ana Paula Ferreira'</text:span>, <text:span text:style-name="T14">'1990-03-15'</text:span>, <text:span text:style-name="T14">'2019-01-10'</text:span>, <text:span text:style-name="T8">NULL</text:span>, <text:span text:style-name="T10">2800</text:span>.<text:span text:style-name="T10">00</text:span>, <text:span text:style-name="T14">'(15) 99101-1111'</text:span>),</text:p>
      <text:p text:style-name="P17">(<text:span text:style-name="T14">'Beatriz Souza Lima'</text:span>, <text:span text:style-name="T14">'1988-07-22'</text:span>, <text:span text:style-name="T14">'2018-05-20'</text:span>, <text:span text:style-name="T8">NULL</text:span>, <text:span text:style-name="T10">3100</text:span>.<text:span text:style-name="T10">00</text:span>, <text:span text:style-name="T14">'(15) 99101-2222'</text:span>),</text:p>
      <text:p text:style-name="P17">(<text:span text:style-name="T14">'Camila Rodrigues'</text:span>, <text:span text:style-name="T14">'1995-11-08'</text:span>, <text:span text:style-name="T14">'2021-03-01'</text:span>, <text:span text:style-name="T8">NULL</text:span>, <text:span text:style-name="T10">2600</text:span>.<text:span text:style-name="T10">00</text:span>, <text:span text:style-name="T14">'(15) 99101-3333'</text:span>),</text:p>
      <text:p text:style-name="P17">(<text:span text:style-name="T14">'Daniela Costa'</text:span>, <text:span text:style-name="T14">'1992-04-30'</text:span>, <text:span text:style-name="T14">'2020-08-15'</text:span>, <text:span text:style-name="T8">NULL</text:span>, <text:span text:style-name="T10">2750</text:span>.<text:span text:style-name="T10">00</text:span>, <text:span text:style-name="T14">'(15) 99101-4444'</text:span>),</text:p>
      <text:p text:style-name="P17">(<text:span text:style-name="T14">'Elaine Martins'</text:span>, <text:span text:style-name="T14">'1985-09-12'</text:span>, <text:span text:style-name="T14">'2015-02-01'</text:span>, <text:span text:style-name="T8">NULL</text:span>, <text:span text:style-name="T10">3500</text:span>.<text:span text:style-name="T10">00</text:span>, <text:span text:style-name="T14">'(15) 99101-5555'</text:span>),</text:p>
      <text:p text:style-name="P17">(<text:span text:style-name="T14">'Fernanda Alves'</text:span>, <text:span text:style-name="T14">'1997-01-25'</text:span>, <text:span text:style-name="T14">'2022-06-10'</text:span>, <text:span text:style-name="T8">NULL</text:span>, <text:span text:style-name="T10">2400</text:span>.<text:span text:style-name="T10">00</text:span>, <text:span text:style-name="T14">'(15) 99101-6666'</text:span>),</text:p>
      <text:p text:style-name="P17">(<text:span text:style-name="T14">'Gabriela Mendes'</text:span>, <text:span text:style-name="T14">'1993-06-18'</text:span>, <text:span text:style-name="T14">'2019-11-01'</text:span>, <text:span text:style-name="T8">NULL</text:span>, <text:span text:style-name="T10">2900</text:span>.<text:span text:style-name="T10">00</text:span>, <text:span text:style-name="T14">'(15) 99101-7777'</text:span>),</text:p>
      <text:p text:style-name="P17">(<text:span text:style-name="T14">'Helena Pereira'</text:span>, <text:span text:style-name="T14">'1991-12-03'</text:span>, <text:span text:style-name="T14">'2020-01-20'</text:span>, <text:span text:style-name="T8">NULL</text:span>, <text:span text:style-name="T10">2700</text:span>.<text:span text:style-name="T10">00</text:span>, <text:span text:style-name="T14">'(15) 99101-8888'</text:span>),</text:p>
      <text:p text:style-name="P17">(<text:span text:style-name="T14">'Isabela Santos'</text:span>, <text:span text:style-name="T14">'1996-08-14'</text:span>, <text:span text:style-name="T14">'2023-02-01'</text:span>, <text:span text:style-name="T8">NULL</text:span>, <text:span text:style-name="T10">2300</text:span>.<text:span text:style-name="T10">00</text:span>, <text:span text:style-name="T14">'(15) 99101-9999'</text:span>),</text:p>
      <text:p text:style-name="P17">(<text:span text:style-name="T14">'Juliana Oliveira'</text:span>, <text:span text:style-name="T14">'1989-05-27'</text:span>, <text:span text:style-name="T14">'2017-07-05'</text:span>, <text:span text:style-name="T8">NULL</text:span>, <text:span text:style-name="T10">3200</text:span>.<text:span text:style-name="T10">00</text:span>, <text:span text:style-name="T14">'(15) 99102-1111'</text:span>),</text:p>
      <text:p text:style-name="P17">(<text:span text:style-name="T14">'Karla Nascimento'</text:span>, <text:span text:style-name="T14">'1994-02-09'</text:span>, <text:span text:style-name="T14">'2021-09-15'</text:span>, <text:span text:style-name="T8">NULL</text:span>, <text:span text:style-name="T10">2650</text:span>.<text:span text:style-name="T10">00</text:span>, <text:span text:style-name="T14">'(15) 99102-2222'</text:span>),</text:p>
      <text:p text:style-name="P17">(<text:span text:style-name="T14">'Larissa Campos'</text:span>, <text:span text:style-name="T14">'1987-10-31'</text:span>, <text:span text:style-name="T14">'2016-04-01'</text:span>, <text:span text:style-name="T14">'2024-12-31'</text:span>, <text:span text:style-name="T10">3000</text:span>.<text:span text:style-name="T10">00</text:span>, <text:span text:style-name="T14">'(15) 99102-3333'</text:span>),</text:p>
      <text:p text:style-name="P17">(<text:span text:style-name="T14">'Mariana Teixeira'</text:span>, <text:span text:style-name="T14">'1998-03-20'</text:span>, <text:span text:style-name="T14">'2023-08-01'</text:span>, <text:span text:style-name="T8">NULL</text:span>, <text:span text:style-name="T10">2250</text:span>.<text:span text:style-name="T10">00</text:span>, <text:span text:style-name="T14">'(15) 99102-4444'</text:span>),</text:p>
      <text:p text:style-name="P17">(<text:span text:style-name="T14">'Natália Gomes'</text:span>, <text:span text:style-name="T14">'1990-07-16'</text:span>, <text:span text:style-name="T14">'2018-10-10'</text:span>, <text:span text:style-name="T8">NULL</text:span>, <text:span text:style-name="T10">2950</text:span>.<text:span text:style-name="T10">00</text:span>, <text:span text:style-name="T14">'(15) 99102-5555'</text:span>),</text:p>
      <text:p text:style-name="P17">(<text:span text:style-name="T14">'Patrícia Barbosa'</text:span>, <text:span text:style-name="T14">'1986-01-04'</text:span>, <text:span text:style-name="T14">'2014-03-01'</text:span>, <text:span text:style-name="T8">NULL</text:span>, <text:span text:style-name="T10">3700</text:span>.<text:span text:style-name="T10">00</text:span>, <text:span text:style-name="T14">'(15) 99102-6666'</text:span>);</text:p>
      <text:p text:style-name="P17"/>
      <text:p text:style-name="P17">-- Atendente x Especialidade</text:p>
      <text:p text:style-name="P17"><text:span text:style-name="T8">INSERT</text:span> <text:span text:style-name="T8">INTO</text:span> Atendente_Especialidade (fk_Atendente, fk_Especialidade) <text:span text:style-name="T9">VALUES</text:span></text:p>
      <text:p text:style-name="P17">(<text:span text:style-name="T10">1</text:span>, <text:span text:style-name="T10">1</text:span>), (<text:span text:style-name="T10">1</text:span>, <text:span text:style-name="T10">3</text:span>), (<text:span text:style-name="T10">1</text:span>, <text:span text:style-name="T10">8</text:span>), <text:span text:style-name="T17">-- Ana Paula: Corte Fem, Coloração, Hidratação</text:span></text:p>
      <text:p text:style-name="P17">(<text:span text:style-name="T10">2</text:span>, <text:span text:style-name="T10">1</text:span>), (<text:span text:style-name="T10">2</text:span>, <text:span text:style-name="T10">10</text:span>), <text:span text:style-name="T17">-- Beatriz: Corte Fem, Progressiva</text:span></text:p>
      <text:p text:style-name="P17">(<text:span text:style-name="T10">3</text:span>, <text:span text:style-name="T10">4</text:span>), (<text:span text:style-name="T10">3</text:span>, <text:span text:style-name="T10">5</text:span>), <text:span text:style-name="T17">-- Camila: Manicure, Pedicure</text:span></text:p>
      <text:p text:style-name="P17">(<text:span text:style-name="T10">4</text:span>, <text:span text:style-name="T10">6</text:span>), (<text:span text:style-name="T10">4</text:span>, <text:span text:style-name="T10">9</text:span>), <text:span text:style-name="T17">-- Daniela: Depilação, Design Sobrancelha</text:span></text:p>
      <text:p text:style-name="P17">(<text:span text:style-name="T10">5</text:span>, <text:span text:style-name="T10">1</text:span>), (<text:span text:style-name="T10">5</text:span>, <text:span text:style-name="T10">2</text:span>), (<text:span text:style-name="T10">5</text:span>, <text:span text:style-name="T10">3</text:span>), <text:span text:style-name="T17">-- Elaine: Corte Fem, Masc, Coloração</text:span></text:p>
      <text:p text:style-name="P17">(<text:span text:style-name="T10">6</text:span>, <text:span text:style-name="T10">4</text:span>), (<text:span text:style-name="T10">6</text:span>, <text:span text:style-name="T10">9</text:span>), <text:span text:style-name="T17">-- Fernanda: Manicure, Design Sobrancelha</text:span></text:p>
      <text:p text:style-name="P17">(<text:span text:style-name="T10">7</text:span>, <text:span text:style-name="T10">7</text:span>), (<text:span text:style-name="T10">7</text:span>, <text:span text:style-name="T10">9</text:span>), <text:span text:style-name="T17">-- Gabriela: Maquiagem, Design Sobrancelha</text:span></text:p>
      <text:p text:style-name="P17">(<text:span text:style-name="T10">8</text:span>, <text:span text:style-name="T10">1</text:span>), (<text:span text:style-name="T10">8</text:span>, <text:span text:style-name="T10">8</text:span>), <text:span text:style-name="T17">-- Helena: Corte Fem, Hidratação</text:span></text:p>
      <text:p text:style-name="P17">(<text:span text:style-name="T10">9</text:span>, <text:span text:style-name="T10">4</text:span>), (<text:span text:style-name="T10">9</text:span>, <text:span text:style-name="T10">5</text:span>), <text:span text:style-name="T17">-- Isabela: Manicure, Pedicure</text:span></text:p>
      <text:p text:style-name="P17">(<text:span text:style-name="T10">10</text:span>, <text:span text:style-name="T10">2</text:span>), (<text:span text:style-name="T10">10</text:span>, <text:span text:style-name="T10">3</text:span>), <text:span text:style-name="T17">-- Juliana: Corte Masc, Coloração</text:span></text:p>
      <text:p text:style-name="P17">(<text:span text:style-name="T10">11</text:span>, <text:span text:style-name="T10">6</text:span>), (<text:span text:style-name="T10">11</text:span>, <text:span text:style-name="T10">5</text:span>), <text:span text:style-name="T17">-- Karla: Depilação, Pedicure</text:span></text:p>
      <text:p text:style-name="P17">(<text:span text:style-name="T10">13</text:span>, <text:span text:style-name="T10">4</text:span>), (<text:span text:style-name="T10">13</text:span>, <text:span text:style-name="T10">5</text:span>), <text:span text:style-name="T17">-- Mariana: Manicure, Pedicure</text:span></text:p>
      <text:p text:style-name="P17">(<text:span text:style-name="T10">14</text:span>, <text:span text:style-name="T10">1</text:span>), (<text:span text:style-name="T10">14</text:span>, <text:span text:style-name="T10">10</text:span>), <text:span text:style-name="T17">-- Natália: Corte Fem, Progressiva</text:span></text:p>
      <text:p text:style-name="P17">(<text:span text:style-name="T10">15</text:span>, <text:span text:style-name="T10">1</text:span>), (<text:span text:style-name="T10">15</text:span>, <text:span text:style-name="T10">2</text:span>), (<text:span text:style-name="T10">15</text:span>, <text:span text:style-name="T10">7</text:span>); <text:span text:style-name="T17">-- Patrícia: Corte Fem, Masc, Maquiagem</text:span></text:p>
      <text:p text:style-name="P17"/>
      <text:p text:style-name="P17">-- Procedimentos (10 registros)</text:p>
      <text:p text:style-name="P17"><text:span text:style-name="T8">INSERT</text:span> <text:span text:style-name="T8">INTO</text:span> Procedimento (Nome, Valor) <text:span text:style-name="T9">VALUES</text:span></text:p>
      <text:p text:style-name="P17">(<text:span text:style-name="T14">'Corte Feminino'</text:span>, <text:span text:style-name="T10">60</text:span>.<text:span text:style-name="T10">00</text:span>),</text:p>
      <text:p text:style-name="P17">(<text:span text:style-name="T14">'Corte Masculino'</text:span>, <text:span text:style-name="T10">35</text:span>.<text:span text:style-name="T10">00</text:span>),</text:p>
      <text:p text:style-name="P17"><text:soft-page-break/>(<text:span text:style-name="T14">'Coloração Completa'</text:span>, <text:span text:style-name="T10">150</text:span>.<text:span text:style-name="T10">00</text:span>),</text:p>
      <text:p text:style-name="P17">(<text:span text:style-name="T14">'Manicure Simples'</text:span>, <text:span text:style-name="T10">30</text:span>.<text:span text:style-name="T10">00</text:span>),</text:p>
      <text:p text:style-name="P17">(<text:span text:style-name="T14">'Pedicure Simples'</text:span>, <text:span text:style-name="T10">35</text:span>.<text:span text:style-name="T10">00</text:span>),</text:p>
      <text:p text:style-name="P17">(<text:span text:style-name="T14">'Depilação Pernas'</text:span>, <text:span text:style-name="T10">80</text:span>.<text:span text:style-name="T10">00</text:span>),</text:p>
      <text:p text:style-name="P17">(<text:span text:style-name="T14">'Maquiagem Social'</text:span>, <text:span text:style-name="T10">120</text:span>.<text:span text:style-name="T10">00</text:span>),</text:p>
      <text:p text:style-name="P17">(<text:span text:style-name="T14">'Hidratação Capilar'</text:span>, <text:span text:style-name="T10">80</text:span>.<text:span text:style-name="T10">00</text:span>),</text:p>
      <text:p text:style-name="P17">(<text:span text:style-name="T14">'Design de Sobrancelha'</text:span>, <text:span text:style-name="T10">25</text:span>.<text:span text:style-name="T10">00</text:span>),</text:p>
      <text:p text:style-name="P17">(<text:span text:style-name="T14">'Escova Progressiva'</text:span>, <text:span text:style-name="T10">250</text:span>.<text:span text:style-name="T10">00</text:span>);</text:p>
      <text:p text:style-name="P17"/>
      <text:p text:style-name="P17">-- Clientes (50 registros)</text:p>
      <text:p text:style-name="P17"><text:span text:style-name="T8">INSERT</text:span> <text:span text:style-name="T8">INTO</text:span> Cliente (Nome, Telefone, Email, DataCadastro) <text:span text:style-name="T9">VALUES</text:span></text:p>
      <text:p text:style-name="P17">(<text:span text:style-name="T14">'Aline Souza'</text:span>, <text:span text:style-name="T14">'(15) 98800-0001'</text:span>, <text:span text:style-name="T14">'aline.souza@email.com'</text:span>, <text:span text:style-name="T14">'2023-01-15'</text:span>),</text:p>
      <text:p text:style-name="P17">(<text:span text:style-name="T14">'Bruna Carvalho'</text:span>, <text:span text:style-name="T14">'(15) 98800-0002'</text:span>, <text:span text:style-name="T14">'bruna.carvalho@email.com'</text:span>, <text:span text:style-name="T14">'2023-02-10'</text:span>),</text:p>
      <text:p text:style-name="P17">(<text:span text:style-name="T14">'Carolina Lima'</text:span>, <text:span text:style-name="T14">'(15) 98800-0003'</text:span>, <text:span text:style-name="T14">'carolina.lima@email.com'</text:span>, <text:span text:style-name="T14">'2023-02-20'</text:span>),</text:p>
      <text:p text:style-name="P17">(<text:span text:style-name="T14">'Débora Mendes'</text:span>, <text:span text:style-name="T14">'(15) 98800-0004'</text:span>, <text:span text:style-name="T14">'debora.mendes@email.com'</text:span>, <text:span text:style-name="T14">'2023-03-05'</text:span>),</text:p>
      <text:p text:style-name="P17">(<text:span text:style-name="T14">'Eduarda Fernandes'</text:span>, <text:span text:style-name="T14">'(15) 98800-0005'</text:span>, <text:span text:style-name="T14">'eduarda.fernandes@email.com'</text:span>, <text:span text:style-name="T14">'2023-03-18'</text:span>),</text:p>
      <text:p text:style-name="P17">(<text:span text:style-name="T14">'Flávia Costa'</text:span>, <text:span text:style-name="T14">'(15) 98800-0006'</text:span>, <text:span text:style-name="T14">'flavia.costa@email.com'</text:span>, <text:span text:style-name="T14">'2023-04-02'</text:span>),</text:p>
      <text:p text:style-name="P17">(<text:span text:style-name="T14">'Giovana Rocha'</text:span>, <text:span text:style-name="T14">'(15) 98800-0007'</text:span>, <text:span text:style-name="T14">'giovana.rocha@email.com'</text:span>, <text:span text:style-name="T14">'2023-04-20'</text:span>),</text:p>
      <text:p text:style-name="P17">(<text:span text:style-name="T14">'Heloísa Martins'</text:span>, <text:span text:style-name="T14">'(15) 98800-0008'</text:span>, <text:span text:style-name="T14">'heloisa.martins@email.com'</text:span>, <text:span text:style-name="T14">'2023-05-08'</text:span>),</text:p>
      <text:p text:style-name="P17">(<text:span text:style-name="T14">'Ingrid Nascimento'</text:span>, <text:span text:style-name="T14">'(15) 98800-0009'</text:span>, <text:span text:style-name="T14">'ingrid.nascimento@email.com'</text:span>, <text:span text:style-name="T14">'2023-05-25'</text:span>),</text:p>
      <text:p text:style-name="P17">(<text:span text:style-name="T14">'Jéssica Oliveira'</text:span>, <text:span text:style-name="T14">'(15) 98800-0010'</text:span>, <text:span text:style-name="T14">'jessica.oliveira@email.com'</text:span>, <text:span text:style-name="T14">'2023-06-10'</text:span>),</text:p>
      <text:p text:style-name="P17">(<text:span text:style-name="T14">'Karina Alves'</text:span>, <text:span text:style-name="T14">'(15) 98800-0011'</text:span>, <text:span text:style-name="T14">'karina.alves@email.com'</text:span>, <text:span text:style-name="T14">'2023-06-22'</text:span>),</text:p>
      <text:p text:style-name="P17">(<text:span text:style-name="T14">'Larissa Pereira'</text:span>, <text:span text:style-name="T14">'(15) 98800-0012'</text:span>, <text:span text:style-name="T14">'larissa.pereira@email.com'</text:span>, <text:span text:style-name="T14">'2023-07-01'</text:span>),</text:p>
      <text:p text:style-name="P17">(<text:span text:style-name="T14">'Marcia Teixeira'</text:span>, <text:span text:style-name="T14">'(15) 98800-0013'</text:span>, <text:span text:style-name="T14">'marcia.teixeira@email.com'</text:span>, <text:span text:style-name="T14">'2023-07-15'</text:span>),</text:p>
      <text:p text:style-name="P17">(<text:span text:style-name="T14">'Nathalia Santos'</text:span>, <text:span text:style-name="T14">'(15) 98800-0014'</text:span>, <text:span text:style-name="T14">'nathalia.santos@email.com'</text:span>, <text:span text:style-name="T14">'2023-08-03'</text:span>),</text:p>
      <text:p text:style-name="P17">(<text:span text:style-name="T14">'Olivia Gomes'</text:span>, <text:span text:style-name="T14">'(15) 98800-0015'</text:span>, <text:span text:style-name="T14">'olivia.gomes@email.com'</text:span>, <text:span text:style-name="T14">'2023-08-20'</text:span>),</text:p>
      <text:p text:style-name="P17">(<text:span text:style-name="T14">'Priscila Barbosa'</text:span>, <text:span text:style-name="T14">'(15) 98800-0016'</text:span>, <text:span text:style-name="T14">'priscila.barbosa@email.com'</text:span>, <text:span text:style-name="T14">'2023-09-05'</text:span>),</text:p>
      <text:p text:style-name="P17">(<text:span text:style-name="T14">'Queila Rodrigues'</text:span>, <text:span text:style-name="T14">'(15) 98800-0017'</text:span>, <text:span text:style-name="T14">'queila.rodrigues@email.com'</text:span>, <text:span text:style-name="T14">'2023-09-18'</text:span>),</text:p>
      <text:p text:style-name="P17">(<text:span text:style-name="T14">'Roberta Campos'</text:span>, <text:span text:style-name="T14">'(15) 98800-0018'</text:span>, <text:span text:style-name="T14">'roberta.campos@email.com'</text:span>, <text:span text:style-name="T14">'2023-10-02'</text:span>),</text:p>
      <text:p text:style-name="P17">(<text:span text:style-name="T14">'Sandra Moreira'</text:span>, <text:span text:style-name="T14">'(15) 98800-0019'</text:span>, <text:span text:style-name="T14">'sandra.moreira@email.com'</text:span>, <text:span text:style-name="T14">'2023-10-20'</text:span>),</text:p>
      <text:p text:style-name="P17">(<text:span text:style-name="T14">'Tatiana Cruz'</text:span>, <text:span text:style-name="T14">'(15) 98800-0020'</text:span>, <text:span text:style-name="T14">'tatiana.cruz@email.com'</text:span>, <text:span text:style-name="T14">'2023-11-08'</text:span>),</text:p>
      <text:p text:style-name="P17">(<text:span text:style-name="T14">'Úrsula Dias'</text:span>, <text:span text:style-name="T14">'(15) 98800-0021'</text:span>, <text:span text:style-name="T14">'ursula.dias@email.com'</text:span>, <text:span text:style-name="T14">'2023-11-25'</text:span>),</text:p>
      <text:p text:style-name="P17">(<text:span text:style-name="T14">'Viviane Freitas'</text:span>, <text:span text:style-name="T14">'(15) 98800-0022'</text:span>, <text:span text:style-name="T14">'viviane.freitas@email.com'</text:span>, <text:span text:style-name="T14">'2023-12-10'</text:span>),</text:p>
      <text:p text:style-name="P17">(<text:span text:style-name="T14">'Wanessa Castro'</text:span>, <text:span text:style-name="T14">'(15) 98800-0023'</text:span>, <text:span text:style-name="T14">'wanessa.castro@email.com'</text:span>, <text:span text:style-name="T14">'2024-01-05'</text:span>),</text:p>
      <text:p text:style-name="P17">(<text:span text:style-name="T14">'Xuxa Pinheiro'</text:span>, <text:span text:style-name="T14">'(15) 98800-0024'</text:span>, <text:span text:style-name="T14">'xuxa.pinheiro@email.com'</text:span>, <text:span text:style-name="T14">'2024-01-20'</text:span>),</text:p>
      <text:p text:style-name="P17">(<text:span text:style-name="T14">'Yasmin Ferreira'</text:span>, <text:span text:style-name="T14">'(15) 98800-0025'</text:span>, <text:span text:style-name="T14">'yasmin.ferreira@email.com'</text:span>, <text:span text:style-name="T14">'2024-02-08'</text:span>),</text:p>
      <text:p text:style-name="P17">(<text:span text:style-name="T14">'Zélia Monteiro'</text:span>, <text:span text:style-name="T14">'(15) 98800-0026'</text:span>, <text:span text:style-name="T14">'zelia.monteiro@email.com'</text:span>, <text:span text:style-name="T14">'2024-02-22'</text:span>),</text:p>
      <text:p text:style-name="P17">(<text:span text:style-name="T14">'Amanda Ribeiro'</text:span>, <text:span text:style-name="T14">'(15) 98800-0027'</text:span>, <text:span text:style-name="T14">'amanda.ribeiro@email.com'</text:span>, <text:span text:style-name="T14">'2024-03-10'</text:span>),</text:p>
      <text:p text:style-name="P17">(<text:span text:style-name="T14">'Bianca Cardoso'</text:span>, <text:span text:style-name="T14">'(15) 98800-0028'</text:span>, <text:span text:style-name="T14">'bianca.cardoso@email.com'</text:span>, <text:span text:style-name="T14">'2024-03-25'</text:span>),</text:p>
      <text:p text:style-name="P17"><text:soft-page-break/>(<text:span text:style-name="T14">'Cristiane Nunes'</text:span>, <text:span text:style-name="T14">'(15) 98800-0029'</text:span>, <text:span text:style-name="T14">'cristiane.nunes@email.com'</text:span>, <text:span text:style-name="T14">'2024-04-08'</text:span>),</text:p>
      <text:p text:style-name="P17">(<text:span text:style-name="T14">'Denise Azevedo'</text:span>, <text:span text:style-name="T14">'(15) 98800-0030'</text:span>, <text:span text:style-name="T14">'denise.azevedo@email.com'</text:span>, <text:span text:style-name="T14">'2024-04-22'</text:span>),</text:p>
      <text:p text:style-name="P17">(<text:span text:style-name="T14">'Elisa Borges'</text:span>, <text:span text:style-name="T14">'(15) 98800-0031'</text:span>, <text:span text:style-name="T14">'elisa.borges@email.com'</text:span>, <text:span text:style-name="T14">'2024-05-05'</text:span>),</text:p>
      <text:p text:style-name="P17">(<text:span text:style-name="T14">'Fabiana Correia'</text:span>, <text:span text:style-name="T14">'(15) 98800-0032'</text:span>, <text:span text:style-name="T14">'fabiana.correia@email.com'</text:span>, <text:span text:style-name="T14">'2024-05-20'</text:span>),</text:p>
      <text:p text:style-name="P17">(<text:span text:style-name="T14">'Graziela Melo'</text:span>, <text:span text:style-name="T14">'(15) 98800-0033'</text:span>, <text:span text:style-name="T14">'graziela.melo@email.com'</text:span>, <text:span text:style-name="T14">'2024-06-03'</text:span>),</text:p>
      <text:p text:style-name="P17">(<text:span text:style-name="T14">'Hellen Vieira'</text:span>, <text:span text:style-name="T14">'(15) 98800-0034'</text:span>, <text:span text:style-name="T14">'hellen.vieira@email.com'</text:span>, <text:span text:style-name="T14">'2024-06-18'</text:span>),</text:p>
      <text:p text:style-name="P17">(<text:span text:style-name="T14">'Iara Cavalcante'</text:span>, <text:span text:style-name="T14">'(15) 98800-0035'</text:span>, <text:span text:style-name="T14">'iara.cavalcante@email.com'</text:span>, <text:span text:style-name="T14">'2024-07-01'</text:span>),</text:p>
      <text:p text:style-name="P17">(<text:span text:style-name="T14">'Joana Macedo'</text:span>, <text:span text:style-name="T14">'(15) 98800-0036'</text:span>, <text:span text:style-name="T14">'joana.macedo@email.com'</text:span>, <text:span text:style-name="T14">'2024-07-15'</text:span>),</text:p>
      <text:p text:style-name="P17">(<text:span text:style-name="T14">'Kelly Andrade'</text:span>, <text:span text:style-name="T14">'(15) 98800-0037'</text:span>, <text:span text:style-name="T14">'kelly.andrade@email.com'</text:span>, <text:span text:style-name="T14">'2024-08-02'</text:span>),</text:p>
      <text:p text:style-name="P17">(<text:span text:style-name="T14">'Lúcia Fonseca'</text:span>, <text:span text:style-name="T14">'(15) 98800-0038'</text:span>, <text:span text:style-name="T14">'lucia.fonseca@email.com'</text:span>, <text:span text:style-name="T14">'2024-08-20'</text:span>),</text:p>
      <text:p text:style-name="P17">(<text:span text:style-name="T14">'Mônica Tavares'</text:span>, <text:span text:style-name="T14">'(15) 98800-0039'</text:span>, <text:span text:style-name="T14">'monica.tavares@email.com'</text:span>, <text:span text:style-name="T14">'2024-09-05'</text:span>),</text:p>
      <text:p text:style-name="P17">(<text:span text:style-name="T14">'Norma Leal'</text:span>, <text:span text:style-name="T14">'(15) 98800-0040'</text:span>, <text:span text:style-name="T14">'norma.leal@email.com'</text:span>, <text:span text:style-name="T14">'2024-09-22'</text:span>),</text:p>
      <text:p text:style-name="P17">(<text:span text:style-name="T14">'Orlanda Pires'</text:span>, <text:span text:style-name="T14">'(15) 98800-0041'</text:span>, <text:span text:style-name="T14">'orlanda.pires@email.com'</text:span>, <text:span text:style-name="T14">'2024-10-08'</text:span>),</text:p>
      <text:p text:style-name="P17">(<text:span text:style-name="T14">'Paula Guimarães'</text:span>, <text:span text:style-name="T14">'(15) 98800-0042'</text:span>, <text:span text:style-name="T14">'paula.guimaraes@email.com'</text:span>, <text:span text:style-name="T14">'2024-10-25'</text:span>),</text:p>
      <text:p text:style-name="P17">(<text:span text:style-name="T14">'Renata Pacheco'</text:span>, <text:span text:style-name="T14">'(15) 98800-0043'</text:span>, <text:span text:style-name="T14">'renata.pacheco@email.com'</text:span>, <text:span text:style-name="T14">'2024-11-10'</text:span>),</text:p>
      <text:p text:style-name="P17">(<text:span text:style-name="T14">'Sabrina Vaz'</text:span>, <text:span text:style-name="T14">'(15) 98800-0044'</text:span>, <text:span text:style-name="T14">'sabrina.vaz@email.com'</text:span>, <text:span text:style-name="T14">'2024-11-28'</text:span>),</text:p>
      <text:p text:style-name="P17">(<text:span text:style-name="T14">'Telma Ramos'</text:span>, <text:span text:style-name="T14">'(15) 98800-0045'</text:span>, <text:span text:style-name="T14">'telma.ramos@email.com'</text:span>, <text:span text:style-name="T14">'2024-12-05'</text:span>),</text:p>
      <text:p text:style-name="P17">(<text:span text:style-name="T14">'Urânia Silva'</text:span>, <text:span text:style-name="T14">'(15) 98800-0046'</text:span>, <text:span text:style-name="T14">'urania.silva@email.com'</text:span>, <text:span text:style-name="T14">'2024-12-20'</text:span>),</text:p>
      <text:p text:style-name="P17">(<text:span text:style-name="T14">'Valdirene Souza'</text:span>, <text:span text:style-name="T14">'(15) 98800-0047'</text:span>, <text:span text:style-name="T14">'valdirene.souza@email.com'</text:span>, <text:span text:style-name="T14">'2025-01-08'</text:span>),</text:p>
      <text:p text:style-name="P17">(<text:span text:style-name="T14">'Wellington Brito'</text:span>, <text:span text:style-name="T14">'(15) 98800-0048'</text:span>, <text:span text:style-name="T14">'wellington.brito@email.com'</text:span>, <text:span text:style-name="T14">'2025-01-22'</text:span>),</text:p>
      <text:p text:style-name="P17">(<text:span text:style-name="T14">'Xênia Torres'</text:span>, <text:span text:style-name="T14">'(15) 98800-0049'</text:span>, <text:span text:style-name="T14">'xenia.torres@email.com'</text:span>, <text:span text:style-name="T14">'2025-02-10'</text:span>),</text:p>
      <text:p text:style-name="P17">(<text:span text:style-name="T14">'Yolanda Queiroz'</text:span>, <text:span text:style-name="T14">'(15) 98800-0050'</text:span>, <text:span text:style-name="T14">'yolanda.queiroz@email.com'</text:span>, <text:span text:style-name="T14">'2025-02-25'</text:span>);</text:p>
      <text:p text:style-name="P17"/>
      <text:p text:style-name="P17">-- Pagamentos (50 registros)</text:p>
      <text:p text:style-name="P17"><text:span text:style-name="T8">INSERT</text:span> <text:span text:style-name="T8">INTO</text:span> Pagamento (Tipo, Valor) <text:span text:style-name="T9">VALUES</text:span></text:p>
      <text:p text:style-name="P17">(<text:span text:style-name="T14">'Pix'</text:span>, <text:span text:style-name="T10">60</text:span>.<text:span text:style-name="T10">00</text:span>),</text:p>
      <text:p text:style-name="P17">(<text:span text:style-name="T14">'Cartão de Crédito'</text:span>, <text:span text:style-name="T10">150</text:span>.<text:span text:style-name="T10">00</text:span>),</text:p>
      <text:p text:style-name="P17">(<text:span text:style-name="T14">'Dinheiro'</text:span>, <text:span text:style-name="T10">30</text:span>.<text:span text:style-name="T10">00</text:span>),</text:p>
      <text:p text:style-name="P17">(<text:span text:style-name="T14">'Cartão de Débito'</text:span>, <text:span text:style-name="T10">35</text:span>.<text:span text:style-name="T10">00</text:span>),</text:p>
      <text:p text:style-name="P17">(<text:span text:style-name="T14">'Pix'</text:span>, <text:span text:style-name="T10">80</text:span>.<text:span text:style-name="T10">00</text:span>),</text:p>
      <text:p text:style-name="P17">(<text:span text:style-name="T14">'Dinheiro'</text:span>, <text:span text:style-name="T10">120</text:span>.<text:span text:style-name="T10">00</text:span>),</text:p>
      <text:p text:style-name="P17">(<text:span text:style-name="T14">'Cartão de Crédito'</text:span>, <text:span text:style-name="T10">250</text:span>.<text:span text:style-name="T10">00</text:span>),</text:p>
      <text:p text:style-name="P17">(<text:span text:style-name="T14">'Pix'</text:span>, <text:span text:style-name="T10">80</text:span>.<text:span text:style-name="T10">00</text:span>),</text:p>
      <text:p text:style-name="P17">(<text:span text:style-name="T14">'Cartão de Débito'</text:span>, <text:span text:style-name="T10">25</text:span>.<text:span text:style-name="T10">00</text:span>),</text:p>
      <text:p text:style-name="P17">(<text:span text:style-name="T14">'Dinheiro'</text:span>, <text:span text:style-name="T10">65</text:span>.<text:span text:style-name="T10">00</text:span>),</text:p>
      <text:p text:style-name="P17">(<text:span text:style-name="T14">'Pix'</text:span>, <text:span text:style-name="T10">35</text:span>.<text:span text:style-name="T10">00</text:span>),</text:p>
      <text:p text:style-name="P17">(<text:span text:style-name="T14">'Cartão de Crédito'</text:span>, <text:span text:style-name="T10">180</text:span>.<text:span text:style-name="T10">00</text:span>),</text:p>
      <text:p text:style-name="P17">(<text:span text:style-name="T14">'Dinheiro'</text:span>, <text:span text:style-name="T10">55</text:span>.<text:span text:style-name="T10">00</text:span>),</text:p>
      <text:p text:style-name="P17">(<text:span text:style-name="T14">'Pix'</text:span>, <text:span text:style-name="T10">110</text:span>.<text:span text:style-name="T10">00</text:span>),</text:p>
      <text:p text:style-name="P17"><text:soft-page-break/>(<text:span text:style-name="T14">'Cartão de Débito'</text:span>, <text:span text:style-name="T10">250</text:span>.<text:span text:style-name="T10">00</text:span>),</text:p>
      <text:p text:style-name="P17">(<text:span text:style-name="T14">'Dinheiro'</text:span>, <text:span text:style-name="T10">30</text:span>.<text:span text:style-name="T10">00</text:span>),</text:p>
      <text:p text:style-name="P17">(<text:span text:style-name="T14">'Pix'</text:span>, <text:span text:style-name="T10">95</text:span>.<text:span text:style-name="T10">00</text:span>),</text:p>
      <text:p text:style-name="P17">(<text:span text:style-name="T14">'Cartão de Crédito'</text:span>, <text:span text:style-name="T10">80</text:span>.<text:span text:style-name="T10">00</text:span>),</text:p>
      <text:p text:style-name="P17">(<text:span text:style-name="T14">'Cartão de Débito'</text:span>, <text:span text:style-name="T10">60</text:span>.<text:span text:style-name="T10">00</text:span>),</text:p>
      <text:p text:style-name="P17">(<text:span text:style-name="T14">'Pix'</text:span>, <text:span text:style-name="T10">145</text:span>.<text:span text:style-name="T10">00</text:span>),</text:p>
      <text:p text:style-name="P17">(<text:span text:style-name="T14">'Dinheiro'</text:span>, <text:span text:style-name="T10">35</text:span>.<text:span text:style-name="T10">00</text:span>),</text:p>
      <text:p text:style-name="P17">(<text:span text:style-name="T14">'Pix'</text:span>, <text:span text:style-name="T10">25</text:span>.<text:span text:style-name="T10">00</text:span>),</text:p>
      <text:p text:style-name="P17">(<text:span text:style-name="T14">'Cartão de Crédito'</text:span>, <text:span text:style-name="T10">330</text:span>.<text:span text:style-name="T10">00</text:span>),</text:p>
      <text:p text:style-name="P17">(<text:span text:style-name="T14">'Dinheiro'</text:span>, <text:span text:style-name="T10">80</text:span>.<text:span text:style-name="T10">00</text:span>),</text:p>
      <text:p text:style-name="P17">(<text:span text:style-name="T14">'Cartão de Débito'</text:span>, <text:span text:style-name="T10">120</text:span>.<text:span text:style-name="T10">00</text:span>),</text:p>
      <text:p text:style-name="P17">(<text:span text:style-name="T14">'Pix'</text:span>, <text:span text:style-name="T10">60</text:span>.<text:span text:style-name="T10">00</text:span>),</text:p>
      <text:p text:style-name="P17">(<text:span text:style-name="T14">'Cartão de Crédito'</text:span>, <text:span text:style-name="T10">250</text:span>.<text:span text:style-name="T10">00</text:span>),</text:p>
      <text:p text:style-name="P17">(<text:span text:style-name="T14">'Dinheiro'</text:span>, <text:span text:style-name="T10">35</text:span>.<text:span text:style-name="T10">00</text:span>),</text:p>
      <text:p text:style-name="P17">(<text:span text:style-name="T14">'Pix'</text:span>, <text:span text:style-name="T10">80</text:span>.<text:span text:style-name="T10">00</text:span>),</text:p>
      <text:p text:style-name="P17">(<text:span text:style-name="T14">'Cartão de Débito'</text:span>, <text:span text:style-name="T10">30</text:span>.<text:span text:style-name="T10">00</text:span>),</text:p>
      <text:p text:style-name="P17">(<text:span text:style-name="T14">'Pix'</text:span>, <text:span text:style-name="T10">200</text:span>.<text:span text:style-name="T10">00</text:span>),</text:p>
      <text:p text:style-name="P17">(<text:span text:style-name="T14">'Cartão de Crédito'</text:span>, <text:span text:style-name="T10">65</text:span>.<text:span text:style-name="T10">00</text:span>),</text:p>
      <text:p text:style-name="P17">(<text:span text:style-name="T14">'Dinheiro'</text:span>, <text:span text:style-name="T10">150</text:span>.<text:span text:style-name="T10">00</text:span>),</text:p>
      <text:p text:style-name="P17">(<text:span text:style-name="T14">'Pix'</text:span>, <text:span text:style-name="T10">55</text:span>.<text:span text:style-name="T10">00</text:span>),</text:p>
      <text:p text:style-name="P17">(<text:span text:style-name="T14">'Cartão de Débito'</text:span>, <text:span text:style-name="T10">25</text:span>.<text:span text:style-name="T10">00</text:span>),</text:p>
      <text:p text:style-name="P17">(<text:span text:style-name="T14">'Dinheiro'</text:span>, <text:span text:style-name="T10">35</text:span>.<text:span text:style-name="T10">00</text:span>),</text:p>
      <text:p text:style-name="P17">(<text:span text:style-name="T14">'Pix'</text:span>, <text:span text:style-name="T10">90</text:span>.<text:span text:style-name="T10">00</text:span>),</text:p>
      <text:p text:style-name="P17">(<text:span text:style-name="T14">'Cartão de Crédito'</text:span>, <text:span text:style-name="T10">175</text:span>.<text:span text:style-name="T10">00</text:span>),</text:p>
      <text:p text:style-name="P17">(<text:span text:style-name="T14">'Cartão de Débito'</text:span>, <text:span text:style-name="T10">80</text:span>.<text:span text:style-name="T10">00</text:span>),</text:p>
      <text:p text:style-name="P17">(<text:span text:style-name="T14">'Pix'</text:span>, <text:span text:style-name="T10">30</text:span>.<text:span text:style-name="T10">00</text:span>),</text:p>
      <text:p text:style-name="P17">(<text:span text:style-name="T14">'Dinheiro'</text:span>, <text:span text:style-name="T10">120</text:span>.<text:span text:style-name="T10">00</text:span>),</text:p>
      <text:p text:style-name="P17">(<text:span text:style-name="T14">'Pix'</text:span>, <text:span text:style-name="T10">60</text:span>.<text:span text:style-name="T10">00</text:span>),</text:p>
      <text:p text:style-name="P17">(<text:span text:style-name="T14">'Cartão de Crédito'</text:span>, <text:span text:style-name="T10">250</text:span>.<text:span text:style-name="T10">00</text:span>),</text:p>
      <text:p text:style-name="P17">(<text:span text:style-name="T14">'Cartão de Débito'</text:span>, <text:span text:style-name="T10">35</text:span>.<text:span text:style-name="T10">00</text:span>),</text:p>
      <text:p text:style-name="P17">(<text:span text:style-name="T14">'Pix'</text:span>, <text:span text:style-name="T10">80</text:span>.<text:span text:style-name="T10">00</text:span>),</text:p>
      <text:p text:style-name="P17">(<text:span text:style-name="T14">'Dinheiro'</text:span>, <text:span text:style-name="T10">25</text:span>.<text:span text:style-name="T10">00</text:span>),</text:p>
      <text:p text:style-name="P17">(<text:span text:style-name="T14">'Pix'</text:span>, <text:span text:style-name="T10">145</text:span>.<text:span text:style-name="T10">00</text:span>),</text:p>
      <text:p text:style-name="P17">(<text:span text:style-name="T14">'Cartão de Crédito'</text:span>, <text:span text:style-name="T10">55</text:span>.<text:span text:style-name="T10">00</text:span>),</text:p>
      <text:p text:style-name="P17">(<text:span text:style-name="T14">'Cartão de Débito'</text:span>, <text:span text:style-name="T10">60</text:span>.<text:span text:style-name="T10">00</text:span>),</text:p>
      <text:p text:style-name="P17">(<text:span text:style-name="T14">'Pix'</text:span>, <text:span text:style-name="T10">100</text:span>.<text:span text:style-name="T10">00</text:span>);</text:p>
      <text:p text:style-name="P17"/>
      <text:p text:style-name="P17">-- Agendamentos (50 registros)</text:p>
      <text:p text:style-name="P17"><text:span text:style-name="T8">INSERT</text:span> <text:span text:style-name="T8">INTO</text:span> Agendamento (Horario, fk_Cliente, fk_Atendente, fk_Pagamento) <text:span text:style-name="T9">VALUES</text:span></text:p>
      <text:p text:style-name="P17"><text:soft-page-break/>(<text:span text:style-name="T14">'2024-01-08 09:00'</text:span>, <text:span text:style-name="T10">1</text:span>, <text:span text:style-name="T10">1</text:span>, <text:span text:style-name="T10">1</text:span>),</text:p>
      <text:p text:style-name="P17">(<text:span text:style-name="T14">'2024-01-10 10:30'</text:span>, <text:span text:style-name="T10">2</text:span>, <text:span text:style-name="T10">2</text:span>, <text:span text:style-name="T10">2</text:span>),</text:p>
      <text:p text:style-name="P17">(<text:span text:style-name="T14">'2024-01-12 14:00'</text:span>, <text:span text:style-name="T10">3</text:span>, <text:span text:style-name="T10">3</text:span>, <text:span text:style-name="T10">3</text:span>),</text:p>
      <text:p text:style-name="P17">(<text:span text:style-name="T14">'2024-01-15 11:00'</text:span>, <text:span text:style-name="T10">4</text:span>, <text:span text:style-name="T10">4</text:span>, <text:span text:style-name="T10">4</text:span>),</text:p>
      <text:p text:style-name="P17">(<text:span text:style-name="T14">'2024-01-18 15:30'</text:span>, <text:span text:style-name="T10">5</text:span>, <text:span text:style-name="T10">5</text:span>, <text:span text:style-name="T10">5</text:span>),</text:p>
      <text:p text:style-name="P17">(<text:span text:style-name="T14">'2024-01-22 09:30'</text:span>, <text:span text:style-name="T10">6</text:span>, <text:span text:style-name="T10">7</text:span>, <text:span text:style-name="T10">6</text:span>),</text:p>
      <text:p text:style-name="P17">(<text:span text:style-name="T14">'2024-01-25 13:00'</text:span>, <text:span text:style-name="T10">7</text:span>, <text:span text:style-name="T10">2</text:span>, <text:span text:style-name="T10">7</text:span>),</text:p>
      <text:p text:style-name="P17">(<text:span text:style-name="T14">'2024-02-01 10:00'</text:span>, <text:span text:style-name="T10">8</text:span>, <text:span text:style-name="T10">8</text:span>, <text:span text:style-name="T10">8</text:span>),</text:p>
      <text:p text:style-name="P17">(<text:span text:style-name="T14">'2024-02-05 16:00'</text:span>, <text:span text:style-name="T10">9</text:span>, <text:span text:style-name="T10">6</text:span>, <text:span text:style-name="T10">9</text:span>),</text:p>
      <text:p text:style-name="P17">(<text:span text:style-name="T14">'2024-02-08 09:00'</text:span>, <text:span text:style-name="T10">10</text:span>, <text:span text:style-name="T10">10</text:span>, <text:span text:style-name="T10">10</text:span>),</text:p>
      <text:p text:style-name="P17">(<text:span text:style-name="T14">'2024-02-12 14:30'</text:span>, <text:span text:style-name="T10">11</text:span>, <text:span text:style-name="T10">3</text:span>, <text:span text:style-name="T10">11</text:span>),</text:p>
      <text:p text:style-name="P17">(<text:span text:style-name="T14">'2024-02-15 11:30'</text:span>, <text:span text:style-name="T10">12</text:span>, <text:span text:style-name="T10">1</text:span>, <text:span text:style-name="T10">12</text:span>),</text:p>
      <text:p text:style-name="P17">(<text:span text:style-name="T14">'2024-02-20 10:00'</text:span>, <text:span text:style-name="T10">13</text:span>, <text:span text:style-name="T10">5</text:span>, <text:span text:style-name="T10">13</text:span>),</text:p>
      <text:p text:style-name="P17">(<text:span text:style-name="T14">'2024-02-22 15:00'</text:span>, <text:span text:style-name="T10">14</text:span>, <text:span text:style-name="T10">4</text:span>, <text:span text:style-name="T10">14</text:span>),</text:p>
      <text:p text:style-name="P17">(<text:span text:style-name="T14">'2024-02-26 09:00'</text:span>, <text:span text:style-name="T10">15</text:span>, <text:span text:style-name="T10">2</text:span>, <text:span text:style-name="T10">15</text:span>),</text:p>
      <text:p text:style-name="P17">(<text:span text:style-name="T14">'2024-03-04 13:30'</text:span>, <text:span text:style-name="T10">16</text:span>, <text:span text:style-name="T10">9</text:span>, <text:span text:style-name="T10">16</text:span>),</text:p>
      <text:p text:style-name="P17">(<text:span text:style-name="T14">'2024-03-07 10:30'</text:span>, <text:span text:style-name="T10">17</text:span>, <text:span text:style-name="T10">1</text:span>, <text:span text:style-name="T10">17</text:span>),</text:p>
      <text:p text:style-name="P17">(<text:span text:style-name="T14">'2024-03-11 14:00'</text:span>, <text:span text:style-name="T10">18</text:span>, <text:span text:style-name="T10">8</text:span>, <text:span text:style-name="T10">18</text:span>),</text:p>
      <text:p text:style-name="P17">(<text:span text:style-name="T14">'2024-03-14 09:00'</text:span>, <text:span text:style-name="T10">19</text:span>, <text:span text:style-name="T10">11</text:span>, <text:span text:style-name="T10">19</text:span>),</text:p>
      <text:p text:style-name="P17">(<text:span text:style-name="T14">'2024-03-18 16:00'</text:span>, <text:span text:style-name="T10">20</text:span>, <text:span text:style-name="T10">7</text:span>, <text:span text:style-name="T10">20</text:span>),</text:p>
      <text:p text:style-name="P17">(<text:span text:style-name="T14">'2024-03-21 10:00'</text:span>, <text:span text:style-name="T10">21</text:span>, <text:span text:style-name="T10">3</text:span>, <text:span text:style-name="T10">21</text:span>),</text:p>
      <text:p text:style-name="P17">(<text:span text:style-name="T14">'2024-03-25 11:30'</text:span>, <text:span text:style-name="T10">22</text:span>, <text:span text:style-name="T10">6</text:span>, <text:span text:style-name="T10">22</text:span>),</text:p>
      <text:p text:style-name="P17">(<text:span text:style-name="T14">'2024-03-28 14:30'</text:span>, <text:span text:style-name="T10">23</text:span>, <text:span text:style-name="T10">2</text:span>, <text:span text:style-name="T10">23</text:span>),</text:p>
      <text:p text:style-name="P17">(<text:span text:style-name="T14">'2024-04-02 09:00'</text:span>, <text:span text:style-name="T10">24</text:span>, <text:span text:style-name="T10">14</text:span>, <text:span text:style-name="T10">24</text:span>),</text:p>
      <text:p text:style-name="P17">(<text:span text:style-name="T14">'2024-04-05 15:00'</text:span>, <text:span text:style-name="T10">25</text:span>, <text:span text:style-name="T10">1</text:span>, <text:span text:style-name="T10">25</text:span>),</text:p>
      <text:p text:style-name="P17">(<text:span text:style-name="T14">'2024-04-09 10:30'</text:span>, <text:span text:style-name="T10">26</text:span>, <text:span text:style-name="T10">10</text:span>, <text:span text:style-name="T10">26</text:span>),</text:p>
      <text:p text:style-name="P17">(<text:span text:style-name="T14">'2024-04-12 13:00'</text:span>, <text:span text:style-name="T10">27</text:span>, <text:span text:style-name="T10">2</text:span>, <text:span text:style-name="T10">27</text:span>),</text:p>
      <text:p text:style-name="P17">(<text:span text:style-name="T14">'2024-04-16 09:30'</text:span>, <text:span text:style-name="T10">28</text:span>, <text:span text:style-name="T10">3</text:span>, <text:span text:style-name="T10">28</text:span>),</text:p>
      <text:p text:style-name="P17">(<text:span text:style-name="T14">'2024-04-19 14:00'</text:span>, <text:span text:style-name="T10">29</text:span>, <text:span text:style-name="T10">4</text:span>, <text:span text:style-name="T10">29</text:span>),</text:p>
      <text:p text:style-name="P17">(<text:span text:style-name="T14">'2024-04-23 11:00'</text:span>, <text:span text:style-name="T10">30</text:span>, <text:span text:style-name="T10">8</text:span>, <text:span text:style-name="T10">30</text:span>),</text:p>
      <text:p text:style-name="P17">(<text:span text:style-name="T14">'2024-05-02 09:00'</text:span>, <text:span text:style-name="T10">31</text:span>, <text:span text:style-name="T10">5</text:span>, <text:span text:style-name="T10">31</text:span>),</text:p>
      <text:p text:style-name="P17">(<text:span text:style-name="T14">'2024-05-06 15:30'</text:span>, <text:span text:style-name="T10">32</text:span>, <text:span text:style-name="T10">15</text:span>, <text:span text:style-name="T10">32</text:span>),</text:p>
      <text:p text:style-name="P17">(<text:span text:style-name="T14">'2024-05-09 10:00'</text:span>, <text:span text:style-name="T10">33</text:span>, <text:span text:style-name="T10">1</text:span>, <text:span text:style-name="T10">33</text:span>),</text:p>
      <text:p text:style-name="P17">(<text:span text:style-name="T14">'2024-05-13 13:30'</text:span>, <text:span text:style-name="T10">34</text:span>, <text:span text:style-name="T10">7</text:span>, <text:span text:style-name="T10">34</text:span>),</text:p>
      <text:p text:style-name="P17">(<text:span text:style-name="T14">'2024-05-16 09:00'</text:span>, <text:span text:style-name="T10">35</text:span>, <text:span text:style-name="T10">6</text:span>, <text:span text:style-name="T10">35</text:span>),</text:p>
      <text:p text:style-name="P17">(<text:span text:style-name="T14">'2024-05-20 14:00'</text:span>, <text:span text:style-name="T10">36</text:span>, <text:span text:style-name="T10">3</text:span>, <text:span text:style-name="T10">36</text:span>),</text:p>
      <text:p text:style-name="P17">(<text:span text:style-name="T14">'2024-05-23 11:30'</text:span>, <text:span text:style-name="T10">37</text:span>, <text:span text:style-name="T10">14</text:span>, <text:span text:style-name="T10">37</text:span>),</text:p>
      <text:p text:style-name="P17">(<text:span text:style-name="T14">'2024-05-27 16:00'</text:span>, <text:span text:style-name="T10">38</text:span>, <text:span text:style-name="T10">2</text:span>, <text:span text:style-name="T10">38</text:span>),</text:p>
      <text:p text:style-name="P17">(<text:span text:style-name="T14">'2024-06-03 09:30'</text:span>, <text:span text:style-name="T10">39</text:span>, <text:span text:style-name="T10">8</text:span>, <text:span text:style-name="T10">39</text:span>),</text:p>
      <text:p text:style-name="P17"><text:soft-page-break/>(<text:span text:style-name="T14">'2024-06-06 10:00'</text:span>, <text:span text:style-name="T10">40</text:span>, <text:span text:style-name="T10">10</text:span>, <text:span text:style-name="T10">40</text:span>),</text:p>
      <text:p text:style-name="P17">(<text:span text:style-name="T14">'2024-06-10 14:30'</text:span>, <text:span text:style-name="T10">41</text:span>, <text:span text:style-name="T10">1</text:span>, <text:span text:style-name="T10">41</text:span>),</text:p>
      <text:p text:style-name="P17">(<text:span text:style-name="T14">'2024-06-13 09:00'</text:span>, <text:span text:style-name="T10">42</text:span>, <text:span text:style-name="T10">4</text:span>, <text:span text:style-name="T10">42</text:span>),</text:p>
      <text:p text:style-name="P17">(<text:span text:style-name="T14">'2024-06-17 15:00'</text:span>, <text:span text:style-name="T10">43</text:span>, <text:span text:style-name="T10">2</text:span>, <text:span text:style-name="T10">43</text:span>),</text:p>
      <text:p text:style-name="P17">(<text:span text:style-name="T14">'2024-06-20 11:00'</text:span>, <text:span text:style-name="T10">44</text:span>, <text:span text:style-name="T10">9</text:span>, <text:span text:style-name="T10">44</text:span>),</text:p>
      <text:p text:style-name="P17">(<text:span text:style-name="T14">'2024-06-24 13:00'</text:span>, <text:span text:style-name="T10">45</text:span>, <text:span text:style-name="T10">3</text:span>, <text:span text:style-name="T10">45</text:span>),</text:p>
      <text:p text:style-name="P17">(<text:span text:style-name="T14">'2024-06-27 09:30'</text:span>, <text:span text:style-name="T10">46</text:span>, <text:span text:style-name="T10">7</text:span>, <text:span text:style-name="T10">46</text:span>),</text:p>
      <text:p text:style-name="P17">(<text:span text:style-name="T14">'2024-07-01 10:30'</text:span>, <text:span text:style-name="T10">47</text:span>, <text:span text:style-name="T10">15</text:span>, <text:span text:style-name="T10">47</text:span>),</text:p>
      <text:p text:style-name="P17">(<text:span text:style-name="T14">'2024-07-04 14:00'</text:span>, <text:span text:style-name="T10">48</text:span>, <text:span text:style-name="T10">5</text:span>, <text:span text:style-name="T10">48</text:span>),</text:p>
      <text:p text:style-name="P17">(<text:span text:style-name="T14">'2024-07-08 09:00'</text:span>, <text:span text:style-name="T10">49</text:span>, <text:span text:style-name="T10">1</text:span>, <text:span text:style-name="T10">49</text:span>),</text:p>
      <text:p text:style-name="P17">(<text:span text:style-name="T14">'2024-07-11 16:00'</text:span>, <text:span text:style-name="T10">50</text:span>, <text:span text:style-name="T10">2</text:span>, <text:span text:style-name="T10">50</text:span>);</text:p>
      <text:p text:style-name="P17"/>
      <text:p text:style-name="P17">-- Procedimento_Agendamento (relaciona procedimentos a agendamentos)</text:p>
      <text:p text:style-name="P17"><text:span text:style-name="T8">INSERT</text:span> <text:span text:style-name="T8">INTO</text:span> Procedimento_Agendamento (fk_Agendamento, fk_Procedimento) <text:span text:style-name="T9">VALUES</text:span></text:p>
      <text:p text:style-name="P17">(<text:span text:style-name="T10">1</text:span>, <text:span text:style-name="T10">1</text:span>), <text:span text:style-name="T17">-- Corte Feminino</text:span></text:p>
      <text:p text:style-name="P17">(<text:span text:style-name="T10">2</text:span>, <text:span text:style-name="T10">3</text:span>), <text:span text:style-name="T17">-- Coloração</text:span></text:p>
      <text:p text:style-name="P17">(<text:span text:style-name="T10">3</text:span>, <text:span text:style-name="T10">4</text:span>), <text:span text:style-name="T17">-- Manicure</text:span></text:p>
      <text:p text:style-name="P17">(<text:span text:style-name="T10">4</text:span>, <text:span text:style-name="T10">6</text:span>), <text:span text:style-name="T17">-- Depilação</text:span></text:p>
      <text:p text:style-name="P17">(<text:span text:style-name="T10">5</text:span>, <text:span text:style-name="T10">8</text:span>), <text:span text:style-name="T17">-- Hidratação</text:span></text:p>
      <text:p text:style-name="P17">(<text:span text:style-name="T10">6</text:span>, <text:span text:style-name="T10">7</text:span>), <text:span text:style-name="T17">-- Maquiagem</text:span></text:p>
      <text:p text:style-name="P17">(<text:span text:style-name="T10">7</text:span>, <text:span text:style-name="T10">10</text:span>), <text:span text:style-name="T17">-- Progressiva</text:span></text:p>
      <text:p text:style-name="P17">(<text:span text:style-name="T10">8</text:span>, <text:span text:style-name="T10">8</text:span>), <text:span text:style-name="T17">-- Hidratação</text:span></text:p>
      <text:p text:style-name="P17">(<text:span text:style-name="T10">9</text:span>, <text:span text:style-name="T10">9</text:span>), <text:span text:style-name="T17">-- Design Sobrancelha</text:span></text:p>
      <text:p text:style-name="P17">(<text:span text:style-name="T10">10</text:span>, <text:span text:style-name="T10">2</text:span>), <text:span text:style-name="T17">-- Corte Masculino</text:span></text:p>
      <text:p text:style-name="P17">(<text:span text:style-name="T10">11</text:span>, <text:span text:style-name="T10">4</text:span>), (<text:span text:style-name="T10">11</text:span>, <text:span text:style-name="T10">5</text:span>), <text:span text:style-name="T17">-- Manicure + Pedicure</text:span></text:p>
      <text:p text:style-name="P17">(<text:span text:style-name="T10">12</text:span>, <text:span text:style-name="T10">3</text:span>), <text:span text:style-name="T17">-- Coloração</text:span></text:p>
      <text:p text:style-name="P17">(<text:span text:style-name="T10">13</text:span>, <text:span text:style-name="T10">1</text:span>), <text:span text:style-name="T17">-- Corte Feminino</text:span></text:p>
      <text:p text:style-name="P17">(<text:span text:style-name="T10">14</text:span>, <text:span text:style-name="T10">6</text:span>), <text:span text:style-name="T17">-- Depilação</text:span></text:p>
      <text:p text:style-name="P17">(<text:span text:style-name="T10">15</text:span>, <text:span text:style-name="T10">10</text:span>), <text:span text:style-name="T17">-- Progressiva</text:span></text:p>
      <text:p text:style-name="P17">(<text:span text:style-name="T10">16</text:span>, <text:span text:style-name="T10">4</text:span>), <text:span text:style-name="T17">-- Manicure</text:span></text:p>
      <text:p text:style-name="P17">(<text:span text:style-name="T10">17</text:span>, <text:span text:style-name="T10">1</text:span>), (<text:span text:style-name="T10">17</text:span>, <text:span text:style-name="T10">8</text:span>), <text:span text:style-name="T17">-- Corte Feminino + Hidratação</text:span></text:p>
      <text:p text:style-name="P17">(<text:span text:style-name="T10">18</text:span>, <text:span text:style-name="T10">8</text:span>), <text:span text:style-name="T17">-- Hidratação</text:span></text:p>
      <text:p text:style-name="P17">(<text:span text:style-name="T10">19</text:span>, <text:span text:style-name="T10">6</text:span>), (<text:span text:style-name="T10">19</text:span>, <text:span text:style-name="T10">9</text:span>), <text:span text:style-name="T17">-- Depilação + Design Sobrancelha</text:span></text:p>
      <text:p text:style-name="P17">(<text:span text:style-name="T10">20</text:span>, <text:span text:style-name="T10">7</text:span>), <text:span text:style-name="T17">-- Maquiagem</text:span></text:p>
      <text:p text:style-name="P17">(<text:span text:style-name="T10">21</text:span>, <text:span text:style-name="T10">5</text:span>), <text:span text:style-name="T17">-- Pedicure</text:span></text:p>
      <text:p text:style-name="P17">(<text:span text:style-name="T10">22</text:span>, <text:span text:style-name="T10">9</text:span>), <text:span text:style-name="T17">-- Design Sobrancelha</text:span></text:p>
      <text:p text:style-name="P17">(<text:span text:style-name="T10">23</text:span>, <text:span text:style-name="T10">3</text:span>), (<text:span text:style-name="T10">23</text:span>, <text:span text:style-name="T10">10</text:span>), <text:span text:style-name="T17">-- Coloração + Progressiva</text:span></text:p>
      <text:p text:style-name="P17">(<text:span text:style-name="T10">24</text:span>, <text:span text:style-name="T10">1</text:span>), <text:span text:style-name="T17">-- Corte Feminino</text:span></text:p>
      <text:p text:style-name="P17">(<text:span text:style-name="T10">25</text:span>, <text:span text:style-name="T10">3</text:span>), <text:span text:style-name="T17">-- Coloração</text:span></text:p>
      <text:p text:style-name="P17"><text:soft-page-break/>(<text:span text:style-name="T10">26</text:span>, <text:span text:style-name="T10">2</text:span>), <text:span text:style-name="T17">-- Corte Masculino</text:span></text:p>
      <text:p text:style-name="P17">(<text:span text:style-name="T10">27</text:span>, <text:span text:style-name="T10">10</text:span>), <text:span text:style-name="T17">-- Progressiva</text:span></text:p>
      <text:p text:style-name="P17">(<text:span text:style-name="T10">28</text:span>, <text:span text:style-name="T10">4</text:span>), (<text:span text:style-name="T10">28</text:span>, <text:span text:style-name="T10">5</text:span>), <text:span text:style-name="T17">-- Manicure + Pedicure</text:span></text:p>
      <text:p text:style-name="P17">(<text:span text:style-name="T10">29</text:span>, <text:span text:style-name="T10">6</text:span>), <text:span text:style-name="T17">-- Depilação</text:span></text:p>
      <text:p text:style-name="P17">(<text:span text:style-name="T10">30</text:span>, <text:span text:style-name="T10">1</text:span>), (<text:span text:style-name="T10">30</text:span>, <text:span text:style-name="T10">8</text:span>), <text:span text:style-name="T17">-- Corte Feminino + Hidratação</text:span></text:p>
      <text:p text:style-name="P17">(<text:span text:style-name="T10">31</text:span>, <text:span text:style-name="T10">8</text:span>), <text:span text:style-name="T17">-- Hidratação</text:span></text:p>
      <text:p text:style-name="P17">(<text:span text:style-name="T10">32</text:span>, <text:span text:style-name="T10">1</text:span>), (<text:span text:style-name="T10">32</text:span>, <text:span text:style-name="T10">7</text:span>), <text:span text:style-name="T17">-- Corte Feminino + Maquiagem</text:span></text:p>
      <text:p text:style-name="P17">(<text:span text:style-name="T10">33</text:span>, <text:span text:style-name="T10">3</text:span>), <text:span text:style-name="T17">-- Coloração</text:span></text:p>
      <text:p text:style-name="P17">(<text:span text:style-name="T10">34</text:span>, <text:span text:style-name="T10">7</text:span>), <text:span text:style-name="T17">-- Maquiagem</text:span></text:p>
      <text:p text:style-name="P17">(<text:span text:style-name="T10">35</text:span>, <text:span text:style-name="T10">9</text:span>), <text:span text:style-name="T17">-- Design Sobrancelha</text:span></text:p>
      <text:p text:style-name="P17">(<text:span text:style-name="T10">36</text:span>, <text:span text:style-name="T10">5</text:span>), <text:span text:style-name="T17">-- Pedicure</text:span></text:p>
      <text:p text:style-name="P17">(<text:span text:style-name="T10">37</text:span>, <text:span text:style-name="T10">1</text:span>), <text:span text:style-name="T17">-- Corte Feminino</text:span></text:p>
      <text:p text:style-name="P17">(<text:span text:style-name="T10">38</text:span>, <text:span text:style-name="T10">10</text:span>), <text:span text:style-name="T17">-- Progressiva</text:span></text:p>
      <text:p text:style-name="P17">(<text:span text:style-name="T10">39</text:span>, <text:span text:style-name="T10">4</text:span>), <text:span text:style-name="T17">-- Manicure</text:span></text:p>
      <text:p text:style-name="P17">(<text:span text:style-name="T10">40</text:span>, <text:span text:style-name="T10">2</text:span>), <text:span text:style-name="T17">-- Corte Masculino</text:span></text:p>
      <text:p text:style-name="P17">(<text:span text:style-name="T10">41</text:span>, <text:span text:style-name="T10">3</text:span>), (<text:span text:style-name="T10">41</text:span>, <text:span text:style-name="T10">8</text:span>), <text:span text:style-name="T17">-- Coloração + Hidratação</text:span></text:p>
      <text:p text:style-name="P17">(<text:span text:style-name="T10">42</text:span>, <text:span text:style-name="T10">6</text:span>), <text:span text:style-name="T17">-- Depilação</text:span></text:p>
      <text:p text:style-name="P17">(<text:span text:style-name="T10">43</text:span>, <text:span text:style-name="T10">10</text:span>), <text:span text:style-name="T17">-- Progressiva</text:span></text:p>
      <text:p text:style-name="P17">(<text:span text:style-name="T10">44</text:span>, <text:span text:style-name="T10">4</text:span>), (<text:span text:style-name="T10">44</text:span>, <text:span text:style-name="T10">5</text:span>), <text:span text:style-name="T17">-- Manicure + Pedicure</text:span></text:p>
      <text:p text:style-name="P17">(<text:span text:style-name="T10">45</text:span>, <text:span text:style-name="T10">1</text:span>), <text:span text:style-name="T17">-- Corte Feminino</text:span></text:p>
      <text:p text:style-name="P17">(<text:span text:style-name="T10">46</text:span>, <text:span text:style-name="T10">7</text:span>), (<text:span text:style-name="T10">46</text:span>, <text:span text:style-name="T10">9</text:span>), <text:span text:style-name="T17">-- Maquiagem + Design Sobrancelha</text:span></text:p>
      <text:p text:style-name="P17">(<text:span text:style-name="T10">47</text:span>, <text:span text:style-name="T10">1</text:span>), (<text:span text:style-name="T10">47</text:span>, <text:span text:style-name="T10">7</text:span>), <text:span text:style-name="T17">-- Corte Feminino + Maquiagem</text:span></text:p>
      <text:p text:style-name="P17">(<text:span text:style-name="T10">48</text:span>, <text:span text:style-name="T10">8</text:span>), <text:span text:style-name="T17">-- Hidratação</text:span></text:p>
      <text:p text:style-name="P17">(<text:span text:style-name="T10">49</text:span>, <text:span text:style-name="T10">3</text:span>), <text:span text:style-name="T17">-- Coloração</text:span></text:p>
      <text:p text:style-name="P17">(<text:span text:style-name="T10">50</text:span>, <text:span text:style-name="T10">10</text:span>); <text:span text:style-name="T17">-- Progressiva</text:span></text:p>
      <text:p text:style-name="P22"><text:span text:style-name="Source_20_Text"><text:span text:style-name="T1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'Cascadia Mono', 'Segoe UI Mono', 'Liberation Mono', Menlo, Monaco, Consolas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>
      <loext:graphic-properties draw:fill="solid" draw:fill-color="#b4b4b4" draw:opacity="100%"/>
      <style:paragraph-properties fo:margin-left="0in" fo:margin-right="0in" fo:margin-top="0in" fo:margin-bottom="0in" style:contextual-spacing="false" fo:line-height="130%" fo:background-color="#b4b4b4" fo:padding="0in" fo:border="none"/>
      <style:text-properties style:font-name="ui-monospace" fo:font-family="ui-monospace, 'Cascadia Mono', 'Segoe UI Mono', 'Liberation Mono', Menlo, Monaco, Consolas, monospace" fo:font-size="9.75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30T10:02:34.597297958</meta:creation-date>
    <dc:date>2026-06-30T14:09:32.885685037</dc:date>
    <meta:editing-duration>PT8M25S</meta:editing-duration>
    <meta:editing-cycles>1</meta:editing-cycles>
    <meta:document-statistic meta:table-count="0" meta:image-count="1" meta:object-count="0" meta:page-count="18" meta:paragraph-count="579" meta:word-count="2894" meta:character-count="23812" meta:non-whitespace-character-count="21489"/>
    <meta:generator>LibreOffice/26.2.4.2$Linux_X86_64 LibreOffice_project/620$Build-2</meta:generator>
  </office:meta>
</office:document-meta>
</file>